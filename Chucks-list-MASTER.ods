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1in"/>
    </style:style>
    <style:style style:name="co2" style:family="table-column">
      <style:table-column-properties fo:break-before="auto" style:column-width="2.0839in"/>
    </style:style>
    <style:style style:name="co3" style:family="table-column">
      <style:table-column-properties fo:break-before="auto" style:column-width="4.3909in"/>
    </style:style>
    <style:style style:name="co4" style:family="table-column">
      <style:table-column-properties fo:break-before="auto" style:column-width="10.0189in"/>
    </style:style>
    <style:style style:name="co5" style:family="table-column">
      <style:table-column-properties fo:break-before="auto" style:column-width="5.1571in"/>
    </style:style>
    <style:style style:name="co6" style:family="table-column">
      <style:table-column-properties fo:break-before="auto" style:column-width="0.4543in"/>
    </style:style>
    <style:style style:name="co7" style:family="table-column">
      <style:table-column-properties fo:break-before="auto" style:column-width="0.889in"/>
    </style:style>
    <style:style style:name="co8" style:family="table-column">
      <style:table-column-properties fo:break-before="auto" style:column-width="0.9862in"/>
    </style:style>
    <style:style style:name="co9" style:family="table-column">
      <style:table-column-properties fo:break-before="auto" style:column-width="1.5457in"/>
    </style:style>
    <style:style style:name="co10" style:family="table-column">
      <style:table-column-properties fo:break-before="auto" style:column-width="4.3799in"/>
    </style:style>
    <style:style style:name="co11" style:family="table-column">
      <style:table-column-properties fo:break-before="auto" style:column-width="7.522in"/>
    </style:style>
    <style:style style:name="co12" style:family="table-column">
      <style:table-column-properties fo:break-before="auto" style:column-width="4.0783in"/>
    </style:style>
    <style:style style:name="ro1" style:family="table-row">
      <style:table-row-properties style:row-height="0.178in" fo:break-before="auto" style:use-optimal-row-height="true"/>
    </style:style>
    <style:style style:name="ro2" style:family="table-row">
      <style:table-row-properties style:row-height="4.4756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1.2882in" fo:break-before="auto" style:use-optimal-row-height="true"/>
    </style:style>
    <style:style style:name="ro5" style:family="table-row">
      <style:table-row-properties style:row-height="3.3634in" fo:break-before="auto" style:use-optimal-row-height="true"/>
    </style:style>
    <style:style style:name="ro6" style:family="table-row">
      <style:table-row-properties style:row-height="3.6811in" fo:break-before="auto" style:use-optimal-row-height="true"/>
    </style:style>
    <style:style style:name="ro7" style:family="table-row">
      <style:table-row-properties style:row-height="3.2043in" fo:break-before="auto" style:use-optimal-row-height="true"/>
    </style:style>
    <style:style style:name="ro8" style:family="table-row">
      <style:table-row-properties style:row-height="2.7272in" fo:break-before="auto" style:use-optimal-row-height="true"/>
    </style:style>
    <style:style style:name="ro9" style:family="table-row">
      <style:table-row-properties style:row-height="1.1291in" fo:break-before="auto" style:use-optimal-row-height="true"/>
    </style:style>
    <style:style style:name="ro10" style:family="table-row">
      <style:table-row-properties style:row-height="0.9701in" fo:break-before="auto" style:use-optimal-row-height="true"/>
    </style:style>
    <style:style style:name="ro11" style:family="table-row">
      <style:table-row-properties style:row-height="2.25in" fo:break-before="auto" style:use-optimal-row-height="true"/>
    </style:style>
    <style:style style:name="ro12" style:family="table-row">
      <style:table-row-properties style:row-height="2.4598in" fo:break-before="auto" style:use-optimal-row-height="true"/>
    </style:style>
    <style:style style:name="ro13" style:family="table-row">
      <style:table-row-properties style:row-height="1.6063in" fo:break-before="auto" style:use-optimal-row-height="true"/>
    </style:style>
    <style:style style:name="ro14" style:family="table-row">
      <style:table-row-properties style:row-height="0.652in" fo:break-before="auto" style:use-optimal-row-height="true"/>
    </style:style>
    <style:style style:name="ro15" style:family="table-row">
      <style:table-row-properties style:row-height="2.4091in" fo:break-before="auto" style:use-optimal-row-height="true"/>
    </style:style>
    <style:style style:name="ro16" style:family="table-row">
      <style:table-row-properties style:row-height="2.5681in" fo:break-before="auto" style:use-optimal-row-height="true"/>
    </style:style>
    <style:style style:name="ro17" style:family="table-row">
      <style:table-row-properties style:row-height="1.7654in" fo:break-before="auto" style:use-optimal-row-height="true"/>
    </style:style>
    <style:style style:name="ro18" style:family="table-row">
      <style:table-row-properties style:row-height="0.4929in" fo:break-before="auto" style:use-optimal-row-height="true"/>
    </style:style>
    <style:style style:name="ro19" style:family="table-row">
      <style:table-row-properties style:row-height="2.8862in" fo:break-before="auto" style:use-optimal-row-height="true"/>
    </style:style>
    <style:style style:name="ro20" style:family="table-row">
      <style:table-row-properties style:row-height="0.811in" fo:break-before="auto" style:use-optimal-row-height="true"/>
    </style:style>
    <style:style style:name="ro21" style:family="table-row">
      <style:table-row-properties style:row-height="1.4472in" fo:break-before="auto" style:use-optimal-row-height="true"/>
    </style:style>
    <style:style style:name="ro22" style:family="table-row">
      <style:table-row-properties style:row-height="2.0917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data-style-name="N37">
      <style:table-cell-properties style:text-align-source="fix" style:repeat-content="false" style:vertical-align="middle"/>
      <style:paragraph-properties fo:text-align="center" fo:margin-left="0in"/>
    </style:style>
    <style:style style:name="ce1"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table-cell-properties fo:wrap-option="wrap"/>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vertical-align="middle"/>
      <style:paragraph-properties fo:text-align="center" fo:margin-left="0in"/>
      <style:text-properties style:font-name="Liberation Sans"/>
    </style:style>
    <style:style style:name="ce30" style:family="table-cell" style:parent-style-name="Default" style:data-style-name="N37">
      <style:table-cell-properties style:text-align-source="fix" style:repeat-content="false" style:vertical-align="middle"/>
      <style:paragraph-properties fo:text-align="center" fo:margin-left="0in"/>
      <style:text-properties style:font-name="Liberation Sans" fo:font-weight="normal" style:font-weight-asian="normal" style:font-weight-complex="normal"/>
    </style:style>
    <style:style style:name="ce17" style:family="table-cell" style:parent-style-name="Default" style:data-style-name="N37">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37">
      <style:table-cell-properties style:text-align-source="fix" style:repeat-content="false" style:vertical-align="middle"/>
      <style:paragraph-properties fo:text-align="center" fo:margin-left="0in"/>
      <style:text-properties style:font-name="Liberation Sans"/>
    </style:style>
    <style:style style:name="ce22" style:family="table-cell" style:parent-style-name="Default" style:data-style-name="N0">
      <style:table-cell-properties style:text-align-source="fix" style:repeat-content="false" style:vertical-align="middle"/>
      <style:paragraph-properties fo:text-align="center" fo:margin-left="0in"/>
      <style:text-properties style:font-name="Liberation Sans"/>
    </style:style>
    <style:style style:name="ce3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style:font-name="Liberation Serif" style:font-name-asian="Segoe UI" style:font-name-complex="Tahoma"/>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ext-properties style:font-name="Liberation Sans"/>
    </style:style>
    <style:style style:name="ce2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wrap-option="wrap"/>
      <style:text-properties style:font-name="Liberation Sans"/>
    </style:style>
    <style:style style:name="ce9" style:family="table-cell" style:parent-style-name="Default">
      <style:table-cell-properties fo:wrap-option="wrap"/>
      <style:text-properties style:font-name="Liberation Serif" style:font-name-asian="Segoe UI" style:font-name-complex="Tahoma"/>
    </style:style>
    <style:style style:name="T1" style:family="text">
      <style:text-properties style:text-position="super 58%"/>
    </style:style>
    <style:style style:name="T2" style:family="text">
      <style:text-properties fo:font-size="12pt" fo:font-weight="bold" style:font-size-asian="12pt" style:font-size-complex="12pt" style:font-weight-asian="bold" style:font-weight-complex="bold"/>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Urgent Bulletins&quot;;&quot;Housing Opportunities&quot;;&quot;Swap Market&quot;;&quot;Local Services &amp; Help&quot;;&quot;Community Announcements&quot;)" table:allow-empty-cell="true" table:display-list="unsorted" table:base-cell-address="Bulletin.C1">
          <table:error-message table:message-type="stop" table:display="true"/>
        </table:content-validation>
        <table:content-validation table:name="val2" table:condition="of:cell-content-is-in-list(&quot;Single&quot;;&quot;Multiple&quot;;&quot;Recurring&quot;)" table:allow-empty-cell="true" table:display-list="unsorted" table:base-cell-address="Events.D1">
          <table:error-message table:message-type="stop" table:display="true"/>
        </table:content-validation>
      </table:content-validations>
      <table:table table:name="Bulletin" table:style-name="ta1">
        <table:table-column table:style-name="co1" table:number-columns-repeated="2" table:default-cell-style-name="ce1"/>
        <table:table-column table:style-name="co2" table:default-cell-style-name="ce2"/>
        <table:table-column table:style-name="co3" table:default-cell-style-name="Default"/>
        <table:table-column table:style-name="co4" table:default-cell-style-name="ce3"/>
        <table:table-column table:style-name="co5" table:default-cell-style-name="Default"/>
        <table:table-column table:style-name="co6" table:default-cell-style-name="Default"/>
        <table:table-column table:style-name="co7" table:number-columns-repeated="16377"/>
        <table:table-row table:style-name="ro1">
          <table:table-cell table:style-name="ce2" office:value-type="string" calcext:value-type="string">
            <text:p>Received</text:p>
          </table:table-cell>
          <table:table-cell table:style-name="ce2" office:value-type="string" calcext:value-type="string">
            <text:p>Expires</text:p>
          </table:table-cell>
          <table:table-cell office:value-type="string" calcext:value-type="string">
            <text:p>Section</text:p>
          </table:table-cell>
          <table:table-cell table:style-name="ce2" office:value-type="string" calcext:value-type="string">
            <text:p>Title</text:p>
          </table:table-cell>
          <table:table-cell table:style-name="ce11" office:value-type="string" calcext:value-type="string">
            <text:p>Text</text:p>
          </table:table-cell>
          <table:table-cell table:style-name="ce2" office:value-type="string" calcext:value-type="string">
            <text:p>Image</text:p>
          </table:table-cell>
          <table:table-cell table:style-name="ce2" office:value-type="string" calcext:value-type="string">
            <text:p>notes</text:p>
          </table:table-cell>
          <table:table-cell table:style-name="ce1" table:number-columns-repeated="16377"/>
        </table:table-row>
        <table:table-row table:style-name="ro2">
          <table:table-cell table:style-name="ce5" office:value-type="date" office:date-value="2026-05-21" calcext:value-type="date">
            <text:p>05/21/26</text:p>
          </table:table-cell>
          <table:table-cell table:style-name="ce5" table:formula="of:=[.A2]+14" office:value-type="date" office:date-value="2026-06-04" calcext:value-type="date">
            <text:p>06/04/26</text:p>
          </table:table-cell>
          <table:table-cell table:content-validation-name="val1" office:value-type="string" calcext:value-type="string">
            <text:p>Community Announcements</text:p>
          </table:table-cell>
          <table:table-cell table:style-name="ce3" office:value-type="string" calcext:value-type="string">
            <text:p>New AmeriCorps Positions</text:p>
          </table:table-cell>
          <table:table-cell office:value-type="string" calcext:value-type="string">
            <text:p>Restorative Practices Coordinator:</text:p>
            <text:p>(June 1-August 31, 2026) The Restorative Practices Coordinator (RPC) will play a pivotal role in supporting a safe, inclusive and supportive environment for Mancos Summer Hub participants. The RPC will implement a system that embeds restorative practices to foster positive relationships, resolve conflicts, and promote social-emotional (SEL) growth. They will serve closely with the Hub Director and On-Site Counselor to conduct RP and SEL lessons, lead restorative circles, provide peer mediation, de-escalation, and conflict resolution strategies, equip staff to do the same and provide recommendations for embedding this in the Summer Hub model generally.</text:p>
            <text:p/>
            <text:p>Education Facilitator:</text:p>
            <text:p>(Sept.1, 2026- May 31, 2027) The SOIL Lab Education Facilitator will support outdoor environmental education programming at the SOIL Outdoor Learning Lab, a community garden, 42-ft Grow Dome greenhouse, and aquaponics facility in Durango, CO. Responsibilities include leading PreK–college field trips, supporting community education events and off-site outreach, assisting with garden maintenance, and contributing to the design and development of The SOIL Hub, a new outdoor gathering and learning space. The member will also help implement new middle and high school curricula focused on science, sustainability, and social-emotional well-being. This is a hands-on, creative role with room to shape programming as the site grows.</text:p>
            <text:p/>
            <text:p>Garden Educator:</text:p>
            <text:p>(Sept. 1, 2026-Aug. 31, 2027) Garden Educators serve at Montezuma School to Farm Project (MSTFP) supporting food literacy education for elementary students in the Cortez and Mancos school districts. Members maintain school gardens, harvest and distribute produce, and lead programming focused on nutrition, food production, and resource conservation. Duties shift seasonally between hands-on gardening and teaching or program planning. Members co-teach garden curriculum aligned to Colorado and Next Generation Science Standards, coordinate with volunteers and community partners, and help plan community outreach events. Members also track AmeriCorps data and attend Team Up trainings and Days of Service. This role requires initiative, adaptability, and cultural awareness.</text:p>
            <text:p/>
            <text:p>All positions will receive a living stipend and an education award on completion of hours. Health insurance and childcare assistance available for full time positions. Additional benefits included depending on the position. </text:p>
            <text:p/>
            <text:p>For more information and to check all active listings go [HERE](https://www.teamupsw.org/team-up-americorps-open-positions)</text:p>
            <text:p>To apply: Email a cover letter and resume to Team Up AmeriCorps Coordinator [Brenna Travis](<text:a xlink:href="mailto:BrennaT@TeamUpSW.org" xlink:type="simple">BrennaT@TeamUpSW.org</text:a>)</text:p>
            <text:p>Be sure to indicate which position(s) you are interested in.</text:p>
          </table:table-cell>
          <table:table-cell table:number-columns-repeated="2"/>
          <table:table-cell table:style-name="Default" table:number-columns-repeated="16377"/>
        </table:table-row>
        <table:table-row table:style-name="ro3">
          <table:table-cell table:style-name="ce5" office:value-type="date" office:date-value="2026-05-21" calcext:value-type="date">
            <text:p>05/21/26</text:p>
          </table:table-cell>
          <table:table-cell table:style-name="ce5" table:formula="of:=[.A3]+14" office:value-type="date" office:date-value="2026-06-04" calcext:value-type="date">
            <text:p>06/04/26</text:p>
          </table:table-cell>
          <table:table-cell table:content-validation-name="val1" office:value-type="string" calcext:value-type="string">
            <text:p>Swap Market</text:p>
          </table:table-cell>
          <table:table-cell table:style-name="ce3" office:value-type="string" calcext:value-type="string">
            <text:p>Refrigerator Needed</text:p>
          </table:table-cell>
          <table:table-cell office:value-type="string" calcext:value-type="string">
            <text:p>Local Mancos youth nonprofit seeks donations (or nominally priced) of used, running refrigerators and/or freezers. Any size welcome and can pick up with 50 miles. Please contact Kevin at 970-533-7492 ext 17 or <text:a xlink:href="mailto:kitchen@deerhillexpeditions.com" xlink:type="simple">kitchen@deerhillexpeditions.com</text:a></text:p>
          </table:table-cell>
          <table:table-cell table:number-columns-repeated="2"/>
          <table:table-cell table:style-name="Default" table:number-columns-repeated="16377"/>
        </table:table-row>
        <table:table-row table:style-name="ro4">
          <table:table-cell table:style-name="ce5" office:value-type="date" office:date-value="2026-05-22" calcext:value-type="date">
            <text:p>05/22/26</text:p>
          </table:table-cell>
          <table:table-cell table:style-name="ce5" table:formula="of:=[.A4]+14" office:value-type="date" office:date-value="2026-06-05" calcext:value-type="date">
            <text:p>06/05/26</text:p>
          </table:table-cell>
          <table:table-cell table:content-validation-name="val1" office:value-type="string" calcext:value-type="string">
            <text:p>Housing Opportunities</text:p>
          </table:table-cell>
          <table:table-cell table:style-name="ce3" office:value-type="string" calcext:value-type="string">
            <text:p>Looking to Buy (and Rent in the Meantime) in Mancos</text:p>
          </table:table-cell>
          <table:table-cell office:value-type="string" calcext:value-type="string">
            <text:p>We're a family actively looking to purchase a home in Mancos. A two or three bedroom close to town is ideal and we don't mind if it needs some fixing up.</text:p>
            <text:p/>
            <text:p>While we search, we're also looking for a furnished rental for 2–4 months starting now, but we're flexible since we are in our camper at the moment.</text:p>
            <text:p>We're quiet, clean, and easy to work with. We own and operate a rental property in Arizona, so we know how to treat a home with care. We have an eight-year-old who loves to be outside and a well trained Australian Shepherd mix.</text:p>
            <text:p>If you have something available or know someone who does, we'd love to connect! Thank you.</text:p>
            <text:p/>
            <text:p>Melissa and Chris 708-347-3078 or 928-300-0481</text:p>
          </table:table-cell>
          <table:table-cell table:number-columns-repeated="2"/>
          <table:table-cell table:style-name="Default" table:number-columns-repeated="16377"/>
        </table:table-row>
        <table:table-row table:style-name="ro5">
          <table:table-cell table:style-name="ce5" office:value-type="date" office:date-value="2026-05-23" calcext:value-type="date">
            <text:p>05/23/26</text:p>
          </table:table-cell>
          <table:table-cell table:style-name="ce5" office:value-type="date" office:date-value="2026-06-01" calcext:value-type="date">
            <text:p>06/01/26</text:p>
          </table:table-cell>
          <table:table-cell table:content-validation-name="val1" office:value-type="string" calcext:value-type="string">
            <text:p>Community Announcements</text:p>
          </table:table-cell>
          <table:table-cell table:style-name="ce3" office:value-type="string" calcext:value-type="string">
            <text:p>Introduction to Shamanism Retreat in Mancos: Early Bird Registration Now Open!</text:p>
          </table:table-cell>
          <table:table-cell office:value-type="string" calcext:value-type="string">
            <text:p>Friends, </text:p>
            <text:p>I am excited to let you know that my Introduction to Shamanic Journeying retreat at Deer Hill in Mancos is back by popular demand! Early Bird Registration is now available through June 30. </text:p>
            <text:p><text:a xlink:href="https://www.cedartreehealing.org/shamanism-retreat-2026" xlink:type="simple">Shamanism in Times of Death and Rebirth: An Introduction to Shamanic Journeying &amp; Sacred Circle Ways</text:a></text:p>
            <text:p>An immersive retreat in beautiful Mancos, Colorado, October 23-25, 2026</text:p>
            <text:p>Why shamanism, and why now? </text:p>
            <text:p/>
            <text:p>Every day, we watch humans living out of harmony with each other and the living world. The destruction is real. The suffering of the most vulnerable among us is real. And many of us are carrying fear, anger, and a grief we can't quite name, a sense that the ground is being torn from beneath us.</text:p>
            <text:p>Many of us long for something vastly different: a new (old) world rooted in sacred reciprocity with each other and the living Earth, and a spiritual practice that supports us to create it. </text:p>
            <text:p/>
            <text:p>This retreat is a doorway in. </text:p>
            <text:p>In this retreat, you will:</text:p>
            <text:p>Learn to find your ground in these times, not in systems that have long failed us, but in the ancient art of shamanic journeying, a practice that empowers you to receive guidance directly from Spirit without any intervening authority figure to tell you what to believe. </text:p>
            <text:p>Practice sacred reciprocity with the natural world and each other.</text:p>
            <text:p>Journey on the most important questions of our times: What might a world rooted in reverence and care for all life look like? How can we birth it? What is your unique role to play?</text:p>
            <text:p>You can find more details and secure your spot <text:a xlink:href="https://www.cedartreehealing.org/shamanism-retreat-2026" xlink:type="simple">here</text:a>.  </text:p>
            <text:p>Thanks for your time, and please feel free to share this with people who may want to hear about it! Kris </text:p>
          </table:table-cell>
          <table:table-cell office:value-type="string" calcext:value-type="string">
            <text:p>Intro-Shamanic-Retreat-2026.jpg</text:p>
          </table:table-cell>
          <table:table-cell/>
          <table:table-cell table:style-name="Default" table:number-columns-repeated="16377"/>
        </table:table-row>
        <table:table-row table:style-name="ro6">
          <table:table-cell table:style-name="ce5" office:value-type="date" office:date-value="2026-05-23" calcext:value-type="date">
            <text:p>05/23/26</text:p>
          </table:table-cell>
          <table:table-cell table:style-name="ce5" office:value-type="date" office:date-value="2026-06-01" calcext:value-type="date">
            <text:p>06/01/26</text:p>
          </table:table-cell>
          <table:table-cell table:content-validation-name="val1" office:value-type="string" calcext:value-type="string">
            <text:p>Community Announcements</text:p>
          </table:table-cell>
          <table:table-cell table:style-name="ce3" office:value-type="string" calcext:value-type="string">
            <text:p>Shamanism as a Way of Life: A Time for Experienced Shamanic Journeyers to Reclaim Rest, Connection, and Community</text:p>
          </table:table-cell>
          <table:table-cell office:value-type="string" calcext:value-type="string">
            <text:p>Friends, </text:p>
            <text:p>I'm excited to share that registration is now open for a retreat I've been dreaming of for a long time:</text:p>
            <text:p/>
            <text:p/>
            <text:p><text:a xlink:href="https://www.cedartreehealing.org/2026-retreat-shamanism-as-a-way-of-life" xlink:type="simple">Shamanism as a Way of Life: A Time for Shamanic Journeyers toReclaim Rest, Connection, and Community </text:a></text:p>
            <text:p>Facilitated by S. Kris Abrams in beautiful southwest Colorado, August 20-23, 2026</text:p>
            <text:p/>
            <text:p>You already know how to journey. You know what it feels like when your Helping Spirits speak, when the land answers back, when something shifts that couldn't have shifted any other way.</text:p>
            <text:p/>
            <text:p>What may be missing is the third thing: not the teaching, not the healing, but the circle. The ongoing community of shamanic journeyers living in sacred reciprocity with each other and the Earth.</text:p>
            <text:p/>
            <text:p>This retreat is an experiment in building that third thing.</text:p>
            <text:p/>
            <text:p>Come rest, reconnect with your Helping Spirits and with each other, deepen your practice, and be part of the second generation of restoring shamanism to a world that needs it most.</text:p>
            <text:p/>
            <text:p>Registration is limited to fifteen. Early registration is encouraged.</text:p>
            <text:p><text:a xlink:href="https://www.cedartreehealing.org/2026-retreat-shamanism-as-a-way-of-life" xlink:type="simple">CLICK HERE TO REGISTER</text:a>, and please share this with anyone who may be ready.</text:p>
            <text:p/>
            <text:p>Thank you! </text:p>
            <text:p>Kris</text:p>
          </table:table-cell>
          <table:table-cell office:value-type="string" calcext:value-type="string">
            <text:p>2026-Advanced-Shamanic-Retreat.png</text:p>
          </table:table-cell>
          <table:table-cell/>
          <table:table-cell table:style-name="Default" table:number-columns-repeated="16377"/>
        </table:table-row>
        <table:table-row table:style-name="ro7">
          <table:table-cell table:style-name="ce5" office:value-type="date" office:date-value="2026-05-23" calcext:value-type="date">
            <text:p>05/23/26</text:p>
          </table:table-cell>
          <table:table-cell table:style-name="ce5" office:value-type="date" office:date-value="2026-06-01" calcext:value-type="date">
            <text:p>06/01/26</text:p>
          </table:table-cell>
          <table:table-cell table:content-validation-name="val1" office:value-type="string" calcext:value-type="string">
            <text:p>Housing Opportunities</text:p>
          </table:table-cell>
          <table:table-cell table:style-name="ce3" office:value-type="string" calcext:value-type="string">
            <text:p>3BD 1.5BA Rental Cortez</text:p>
          </table:table-cell>
          <table:table-cell office:value-type="string" calcext:value-type="string">
            <text:p>3 BED - 1.5 BATH HOUSE - $2,000/mo. + utilities</text:p>
            <text:p>Available July 1<text:span text:style-name="T1">st</text:span></text:p>
            <text:p/>
            <text:p>Located on a spacious 0.25-acre corner lot at the end of North Market Street, this 3-bedroom, 1.5-bath, 1,200 sq. ft. home offers the perfect balance of in-town convenience and direct access to nature.</text:p>
            <text:p>Enjoy unobstructed views of the La Plata Mountains and the Colorado Plateau from all three bedrooms—two with sliding glass doors.</text:p>
            <text:p>Step out into the fully fenced backyard—featuring a large stone patio—and walk directly into Carpenter Nature Area and Geer Open Space, where you can stroll or bike for miles.</text:p>
            <text:p>Or walk just over a quarter mile south to enjoy nearby restaurants, shops, and a local brewery.</text:p>
            <text:p>This section of Market Street is wide and calm, featuring a tree and grass-lined center island that adds to the neighborhood’s beauty and peaceful atmosphere.</text:p>
            <text:p>The property includes mature and more recently planted trees in both the front and back yards, a small front porch, and additional green space to enjoy.</text:p>
            <text:p>The home features a one-car attached garage with ample storage, a private driveway with carport, and newer appliances, including a Bosch dishwasher and a washer/dryer set (all about three years old).</text:p>
            <text:p>A/C is available for comfort in the warmer months.</text:p>
            <text:p>The hardwood floors (in all rooms except the kitchen) are scheduled to be refinished in mid-June.</text:p>
            <text:p>One year lease and security deposit required.</text:p>
            <text:p>Well-behaved pets are allowed with a deposit.</text:p>
            <text:p>Sewer is included; all other utilities are the responsibility of the tenant.</text:p>
            <text:p>TEXT/CALL FOR MORE INFORMATION</text:p>
            <text:p>970.676.1146 </text:p>
          </table:table-cell>
          <table:table-cell office:value-type="string" calcext:value-type="string">
            <text:p>3BD-1.5BA-RENTAL.jpg</text:p>
          </table:table-cell>
          <table:table-cell/>
          <table:table-cell table:style-name="Default" table:number-columns-repeated="16377"/>
        </table:table-row>
        <table:table-row table:style-name="ro1">
          <table:table-cell table:style-name="ce5" office:value-type="date" office:date-value="2026-05-23" calcext:value-type="date">
            <text:p>05/23/26</text:p>
          </table:table-cell>
          <table:table-cell table:style-name="ce5" office:value-type="date" office:date-value="2026-06-01" calcext:value-type="date">
            <text:p>06/01/26</text:p>
          </table:table-cell>
          <table:table-cell table:content-validation-name="val1" office:value-type="string" calcext:value-type="string">
            <text:p>Swap Market</text:p>
          </table:table-cell>
          <table:table-cell table:style-name="ce3" office:value-type="string" calcext:value-type="string">
            <text:p>Antiques for Sale</text:p>
          </table:table-cell>
          <table:table-cell office:value-type="string" calcext:value-type="string">
            <text:p>A sale of antique furniture (and newer) in a private Cortez home.Call for information.  970.570.7555</text:p>
          </table:table-cell>
          <table:table-cell table:number-columns-repeated="2"/>
          <table:table-cell table:style-name="Default" table:number-columns-repeated="16377"/>
        </table:table-row>
        <table:table-row table:style-name="ro8">
          <table:table-cell table:style-name="ce5" office:value-type="date" office:date-value="2026-05-25" calcext:value-type="date">
            <text:p>05/25/26</text:p>
          </table:table-cell>
          <table:table-cell table:style-name="ce5" office:value-type="date" office:date-value="2026-05-31" calcext:value-type="date">
            <text:p>05/31/26</text:p>
          </table:table-cell>
          <table:table-cell table:content-validation-name="val1" office:value-type="string" calcext:value-type="string">
            <text:p>Community Announcements</text:p>
          </table:table-cell>
          <table:table-cell table:style-name="ce3" office:value-type="string" calcext:value-type="string">
            <text:p>RODEO Window Painting Competition </text:p>
          </table:table-cell>
          <table:table-cell office:value-type="string" calcext:value-type="string">
            <text:p>Attention Local Businesses!</text:p>
            <text:p>It’s almost rodeo time, and the UMR Window Decorating Contest is back!</text:p>
            <text:p/>
            <text:p>This year’s theme is:</text:p>
            <text:p>250 Years of Freedom</text:p>
            <text:p>Celebrating the Spirit of the USA! (1776–2026) Businesses throughout the area are invited to decorate their storefronts and windows in patriotic western style for a chance to win cash prizes and rodeo tickets.</text:p>
            <text:p/>
            <text:p>Prizes:</text:p>
            <text:p>🥇 1st Place – $200 + 2 rodeo tickets</text:p>
            <text:p>🥈 2nd Place – $150 + 2 rodeo tickets</text:p>
            <text:p>🥉 3rd Place – $100 + 2 rodeo tickets</text:p>
            <text:p/>
            <text:p>To enter, text:</text:p>
            <text:p>Elizabeth Sparks @ 970-739-5776 - with your business name, address, and email address. Displays must be completed by 8:00 AM on Monday, June 1st. Let’s make our community festive, fun, and full of rodeo spirit!</text:p>
            <text:p>See attached flyer for full details.</text:p>
          </table:table-cell>
          <table:table-cell office:value-type="string" calcext:value-type="string">
            <text:p>Rodeo-window.png</text:p>
          </table:table-cell>
          <table:table-cell/>
          <table:table-cell table:style-name="Default" table:number-columns-repeated="16377"/>
        </table:table-row>
        <table:table-row table:style-name="ro9">
          <table:table-cell table:style-name="ce5" office:value-type="date" office:date-value="2026-05-26" calcext:value-type="date">
            <text:p>05/26/26</text:p>
          </table:table-cell>
          <table:table-cell table:style-name="ce5" office:value-type="date" office:date-value="2026-05-30" calcext:value-type="date">
            <text:p>05/30/26</text:p>
          </table:table-cell>
          <table:table-cell table:content-validation-name="val1" office:value-type="string" calcext:value-type="string">
            <text:p>Swap Market</text:p>
          </table:table-cell>
          <table:table-cell table:style-name="ce3" office:value-type="string" calcext:value-type="string">
            <text:p>Garage Sale Announcement</text:p>
          </table:table-cell>
          <table:table-cell office:value-type="string" calcext:value-type="string">
            <text:p>Come to our garage sale this Saturday, 5/30, from 9:00-4:00.</text:p>
            <text:p/>
            <text:p>The sale will have items from 3 homes and will include household items, artwork, plants, and toys/games.</text:p>
            <text:p>Of specific interest may be Lego Mindstorm, an electric drum kit, and Pokémon things.</text:p>
            <text:p>We are at 146 W. Montezuma Ave in Cortez.</text:p>
            <text:p/>
            <text:p>Thanks for helping us do some down sizing.  Geof</text:p>
          </table:table-cell>
          <table:table-cell table:number-columns-repeated="2"/>
          <table:table-cell table:style-name="Default" table:number-columns-repeated="16377"/>
        </table:table-row>
        <table:table-row table:style-name="ro10">
          <table:table-cell table:style-name="ce5" office:value-type="date" office:date-value="2026-05-26" calcext:value-type="date">
            <text:p>05/26/26</text:p>
          </table:table-cell>
          <table:table-cell table:style-name="ce5" office:value-type="date" office:date-value="2026-06-03" calcext:value-type="date">
            <text:p>06/03/26</text:p>
          </table:table-cell>
          <table:table-cell table:content-validation-name="val1" office:value-type="string" calcext:value-type="string">
            <text:p>Community Announcements</text:p>
          </table:table-cell>
          <table:table-cell table:style-name="ce3" office:value-type="string" calcext:value-type="string">
            <text:p>MSTFP is Hiring AmeriCorps </text:p>
          </table:table-cell>
          <table:table-cell office:value-type="string" calcext:value-type="string">
            <text:p>The Montezuma School to Farm Project is looking for two AmeriCorps service members starting September 1st for a 1 year term of service as a Garden Educator.</text:p>
            <text:p>Pay is a stipend of $1,115.63 twice a month and upon completion of the service term you will receive a $5,176.50 education award.</text:p>
            <text:p>We are looking for someone interested in growing food, increasing food literacy and working with students!</text:p>
            <text:p/>
            <text:p>Visit our website to learn more or [email](<text:a xlink:href="mailto:sredford@mstfp.org" xlink:type="simple">sredford@mstfp.org</text:a>)</text:p>
          </table:table-cell>
          <table:table-cell office:value-type="string" calcext:value-type="string">
            <text:p>MSTFP-AmeriCorps.png</text:p>
          </table:table-cell>
          <table:table-cell/>
          <table:table-cell table:style-name="Default" table:number-columns-repeated="16377"/>
        </table:table-row>
        <table:table-row table:style-name="ro10">
          <table:table-cell table:style-name="ce5" office:value-type="date" office:date-value="2026-05-26" calcext:value-type="date">
            <text:p>05/26/26</text:p>
          </table:table-cell>
          <table:table-cell table:style-name="ce5" office:value-type="date" office:date-value="2026-06-03" calcext:value-type="date">
            <text:p>06/03/26</text:p>
          </table:table-cell>
          <table:table-cell table:content-validation-name="val1" office:value-type="string" calcext:value-type="string">
            <text:p>Swap Market</text:p>
          </table:table-cell>
          <table:table-cell table:style-name="ce3" office:value-type="string" calcext:value-type="string">
            <text:p>Seeking packing materials </text:p>
          </table:table-cell>
          <table:table-cell office:value-type="string" calcext:value-type="string">
            <text:p>Hello all!</text:p>
            <text:p/>
            <text:p>I am in search of sheets or rolls of bubble wrap (small bubbles) for wrapping various artworks for my customers.</text:p>
            <text:p>I have no problem ordering some, but I would rather reuse what someone else no longer has a need for!</text:p>
            <text:p/>
            <text:p>Please call or text the shop at 970.560.6455 or email me [Angie](<text:a xlink:href="mailto:oddcatbooks@gmail.com" xlink:type="simple">oddcatbooks@gmail.com</text:a>).Thank you!!Angie Beal</text:p>
          </table:table-cell>
          <table:table-cell table:number-columns-repeated="2"/>
          <table:table-cell table:style-name="Default" table:number-columns-repeated="16377"/>
        </table:table-row>
        <table:table-row table:style-name="ro11">
          <table:table-cell table:style-name="ce5" office:value-type="date" office:date-value="2026-05-27" calcext:value-type="date">
            <text:p>05/27/26</text:p>
          </table:table-cell>
          <table:table-cell table:style-name="ce5" office:value-type="date" office:date-value="2026-06-04" calcext:value-type="date">
            <text:p>06/04/26</text:p>
          </table:table-cell>
          <table:table-cell table:content-validation-name="val1" office:value-type="string" calcext:value-type="string">
            <text:p>Community Announcements</text:p>
          </table:table-cell>
          <table:table-cell table:style-name="ce3" office:value-type="string" calcext:value-type="string">
            <text:p>Zuma Natural Foods is Hiring</text:p>
          </table:table-cell>
          <table:table-cell office:value-type="string" calcext:value-type="string">
            <text:p>Come work with us!!!</text:p>
            <text:p>We are an amazing team of people committed to one another and our community.  Providing the best organic and local food in the town of Mancos.  Excellent customer service skill, consistency, and curiosity are essential to be successful in any position on our team.</text:p>
            <text:p>Produce Buyer (FT)</text:p>
            <text:p>·       Enjoyment of Customer Service a MUST.</text:p>
            <text:p>·       Produce Job Description:  Working on the retail floor while juggling multiple customer service demands, including but not limited to stocking and maintaining inventory levels, purchasing products within product and inventory guidelines, and cashiering.</text:p>
            <text:p>·       Produce Schedule: Tuesday- Saturday, 3 opening and 2 closing shifts</text:p>
            <text:p>  Deli Asst (FT)</text:p>
            <text:p>·       Deli Assistant Job Description: Prepping for kitchen work,  develop a work pace sufficient to handle heavy rushes, ensure that all food prepared meets quality standards, ensure that all deli cases are stocked and merchandised nicely. Maintain deli and food storage areas in sanitary, orderly condition meeting Health Department standards.</text:p>
            <text:p/>
            <text:p>[Email Resume](<text:a xlink:href="mailto:zumanaturalfoods@yahoo.com" xlink:type="simple">zumanaturalfoods@yahoo.com</text:a>)</text:p>
          </table:table-cell>
          <table:table-cell office:value-type="string" calcext:value-type="string">
            <text:p>Zuma-Job-Posting.png</text:p>
          </table:table-cell>
          <table:table-cell/>
          <table:table-cell table:style-name="Default" table:number-columns-repeated="16377"/>
        </table:table-row>
        <table:table-row table:style-name="ro12">
          <table:table-cell table:style-name="ce5" office:value-type="date" office:date-value="2026-05-27" calcext:value-type="date">
            <text:p>05/27/26</text:p>
          </table:table-cell>
          <table:table-cell table:style-name="ce5" office:value-type="date" office:date-value="2026-06-04" calcext:value-type="date">
            <text:p>06/04/26</text:p>
          </table:table-cell>
          <table:table-cell table:content-validation-name="val1" office:value-type="string" calcext:value-type="string">
            <text:p>Local Services &amp; Help</text:p>
          </table:table-cell>
          <table:table-cell table:style-name="ce3" office:value-type="string" calcext:value-type="string">
            <text:p>🌟 Free 6-Week Summer Family Wellness Program in Cortez (Teens 11–19, Dinner Included!) </text:p>
          </table:table-cell>
          <table:table-cell office:value-type="string" calcext:value-type="string">
            <text:p>Hi everyone!</text:p>
            <text:p>My name is Elvia German-Palacios, and I am the Program Coordinator for Health Without Barriers, a free 6-week family wellness program through Colorado State University Extension serving families right here in Southwest Colorado.</text:p>
            <text:p>We have an exciting summer cohort coming up in Cortez, and we would love to invite your family to join us! We are looking for families with teens ages 11–19. The whole family is welcome—siblings of all ages included—and dinner is provided at every single session.</text:p>
            <text:p>It’s a fantastic, free opportunity to connect, learn, and enjoy a great meal together this summer.</text:p>
            <text:p><text:span text:style-name="T2">🗓️ 2026 Cortez Schedule</text:span></text:p>
            <text:p>Days: Wednesdays &amp; Thursdays</text:p>
            <text:p>Time: 5:30 PM – 7:45 PM</text:p>
            <text:p><text:span text:style-name="T2">📍 Locations &amp; Dates</text:span></text:p>
            <text:p>June 3 – July 3: Cortez Middle School</text:p>
            <text:p>July 8 – July 16: Montezuma County Annex</text:p>
            <text:p>I’ve attached our flyer to this post with all the details. [Families can sign up or learn more directly](<text:a xlink:href="https://redcap.ucdenver.edu/surveys/?s=4XW7TNM8AFE3K3HL" xlink:type="simple">https://redcap.ucdenver.edu/surveys/?s=4XW7TNM8AFE3K3HL</text:a>)</text:p>
            <text:p>Thank you so much for reading and helping us spread the word. It means a great deal to the community and the families we serve. Hope to see you there!</text:p>
          </table:table-cell>
          <table:table-cell table:number-columns-repeated="2"/>
          <table:table-cell table:style-name="Default" table:number-columns-repeated="16377"/>
        </table:table-row>
        <table:table-row table:style-name="ro13">
          <table:table-cell table:style-name="ce5" office:value-type="date" office:date-value="2026-05-27" calcext:value-type="date">
            <text:p>05/27/26</text:p>
          </table:table-cell>
          <table:table-cell table:style-name="ce5" office:value-type="date" office:date-value="2026-06-04" calcext:value-type="date">
            <text:p>06/04/26</text:p>
          </table:table-cell>
          <table:table-cell table:content-validation-name="val1" office:value-type="string" calcext:value-type="string">
            <text:p>Urgent Bulletins</text:p>
          </table:table-cell>
          <table:table-cell table:style-name="ce3" office:value-type="string" calcext:value-type="string">
            <text:p>Community Announcement</text:p>
          </table:table-cell>
          <table:table-cell office:value-type="string" calcext:value-type="string">
            <text:p>The Board of County Commissioners has voted to reinstate a fire ban in all unincorporated areas of Montezuma County due to increasing fire danger and dry conditions.  The fire ban will be in effect as of Thursday, May 28, at 6:00 am.</text:p>
            <text:p>This fire ban means:</text:p>
            <text:p>-No open burning</text:p>
            <text:p>-No agricultural burning</text:p>
            <text:p>-No campfires</text:p>
            <text:p>-No use of fireworks in unincorporated areas</text:p>
            <text:p>Residents are urged to use extreme caution with anything that could spark a fire. With current conditions, one spark is all it takes.</text:p>
            <text:p>Please help protect our communities, firefighters, public lands, homes, and natural resources by following all fire restrictions.</text:p>
            <text:p>For current fire restriction information, please visit the County website at <text:a xlink:href="https://montezumacounty.gov/fire-restriction-information/" xlink:type="simple">https://montezumacounty.gov/fire-restriction-information/</text:a></text:p>
          </table:table-cell>
          <table:table-cell office:value-type="string" calcext:value-type="string">
            <text:p>USE-CAUTION.png</text:p>
          </table:table-cell>
          <table:table-cell/>
          <table:table-cell table:style-name="Default" table:number-columns-repeated="16377"/>
        </table:table-row>
        <table:table-row table:style-name="ro14">
          <table:table-cell table:style-name="ce5" office:value-type="date" office:date-value="2026-05-29" calcext:value-type="date">
            <text:p>05/29/26</text:p>
          </table:table-cell>
          <table:table-cell table:style-name="ce5" office:value-type="date" office:date-value="2026-06-06" calcext:value-type="date">
            <text:p>06/06/26</text:p>
          </table:table-cell>
          <table:table-cell table:content-validation-name="val1" office:value-type="string" calcext:value-type="string">
            <text:p>Community Announcements</text:p>
          </table:table-cell>
          <table:table-cell table:style-name="ce3" office:value-type="string" calcext:value-type="string">
            <text:p>Harris Bank Building / Bookstore / Apothocary Building for sale</text:p>
          </table:table-cell>
          <table:table-cell office:value-type="string" calcext:value-type="string">
            <text:p>501 Central Ave, Dolores</text:p>
            <text:p>439,000</text:p>
            <text:p/>
            <text:p>[See more](<text:a xlink:href="https://www.realtor.com/realestateandhomes-detail/501-Central-Ave_Dolores_CO_81323_M28237-62580?from=srp_next" xlink:type="simple">https://www.realtor.com/realestateandhomes-detail/501-Central-Ave_Dolores_CO_81323_M28237-62580?from=srp_next</text:a>)</text:p>
          </table:table-cell>
          <table:table-cell office:value-type="string" calcext:value-type="string">
            <text:p>Harris-Bank-Building.png</text:p>
          </table:table-cell>
          <table:table-cell/>
          <table:table-cell table:style-name="Default" table:number-columns-repeated="16377"/>
        </table:table-row>
        <table:table-row table:style-name="ro9">
          <table:table-cell table:style-name="ce5" office:value-type="date" office:date-value="2026-05-29" calcext:value-type="date">
            <text:p>05/29/26</text:p>
          </table:table-cell>
          <table:table-cell table:style-name="ce5" office:value-type="date" office:date-value="2026-06-06" calcext:value-type="date">
            <text:p>06/06/26</text:p>
          </table:table-cell>
          <table:table-cell table:content-validation-name="val1" office:value-type="string" calcext:value-type="string">
            <text:p>Community Announcements</text:p>
          </table:table-cell>
          <table:table-cell table:style-name="ce3" office:value-type="string" calcext:value-type="string">
            <text:p>Alternative Forages &amp; Soil Health Demonstration Projects</text:p>
          </table:table-cell>
          <table:table-cell office:value-type="string" calcext:value-type="string">
            <text:p>District staff have begun implementation of the Alternative Forage and Soil Health Demonstration Program. Site visits have been completed, and participating producers are working with the District to establish demonstration plots that will evaluate alternative forage species, soil health practices, and water optimization strategies.</text:p>
            <text:p/>
            <text:p>Baseline monitoring, including soil testing and preparation for soil moisture monitoring, is underway. These projects are also supporting implementation of the Soil Health and Optimizing Water (SHOW) Grant, with demonstration sites being prepared, monitoring equipment ordered, and field days and peer-to-peer learning opportunities planned for later this year.</text:p>
          </table:table-cell>
          <table:table-cell table:number-columns-repeated="2"/>
          <table:table-cell table:style-name="Default" table:number-columns-repeated="16377"/>
        </table:table-row>
        <table:table-row table:style-name="ro15">
          <table:table-cell table:style-name="ce5" office:value-type="date" office:date-value="2026-05-29" calcext:value-type="date">
            <text:p>05/29/26</text:p>
          </table:table-cell>
          <table:table-cell table:style-name="ce5" office:value-type="date" office:date-value="2026-06-06" calcext:value-type="date">
            <text:p>06/06/26</text:p>
          </table:table-cell>
          <table:table-cell table:content-validation-name="val1" office:value-type="string" calcext:value-type="string">
            <text:p>Local Services &amp; Help</text:p>
          </table:table-cell>
          <table:table-cell table:style-name="ce3" office:value-type="string" calcext:value-type="string">
            <text:p>2026 Herbicide Cost Share Program</text:p>
          </table:table-cell>
          <table:table-cell office:value-type="string" calcext:value-type="string">
            <text:p>Anyone owning, controlling, or operating land in Montezuma County—including SUBDIVISIONS, DITCH COMPANIES, AND GRAVEL PIT OPERATIONS—may apply for the weed cost share program. The High Desert Conservation District continues to work with Montezuma County to administer the program, allowing landowners to SAVE UP TO 50% on Herbicide Costs!</text:p>
            <text:p/>
            <text:p>NOW TAKING APPLICATIONS! DON'T WAIT, FUNDING IS LIMITED!</text:p>
            <text:p/>
            <text:p>Applications can be found online from the High Desert Conservation District at https://hdcd.colorado.gov/ and at the Montezuma County Noxious Weed Program [Website](<text:a xlink:href="http://www.montezumacounty.org/" xlink:type="simple">www.montezumacounty.org</text:a>).</text:p>
            <text:p/>
            <text:p>Contact Information:</text:p>
            <text:p>Neva Connolly (High Desert Conservation District Director): 628 W. 5th St. Cortez, CO 81321 | Phone: 970-508-0674 | [Email](admin@highdesertconsevation.org)</text:p>
            <text:p/>
            <text:p>Russell Smith (Montezuma County Noxious Weed Technician): Phone: (970) 565-0580 | [Email](rsmith@co.montezuma.co.us0 | [Web](<text:a xlink:href="http://www.co.montezuma.co.us/newsite/weedshome.html" xlink:type="simple">http://www.co.montezuma.co.us/newsite/weedshome.html</text:a>)</text:p>
          </table:table-cell>
          <table:table-cell office:value-type="string" calcext:value-type="string">
            <text:p>HCSP-Promotional-Flyer.jpg</text:p>
          </table:table-cell>
          <table:table-cell/>
          <table:table-cell table:style-name="Default" table:number-columns-repeated="16377"/>
        </table:table-row>
        <table:table-row table:style-name="ro16">
          <table:table-cell table:style-name="ce5" table:number-columns-repeated="2"/>
          <table:table-cell table:content-validation-name="val1"/>
          <table:table-cell table:style-name="ce3"/>
          <table:table-cell/>
          <table:table-cell table:style-name="ce12"/>
          <table:table-cell/>
          <table:table-cell table:style-name="Default" table:number-columns-repeated="16377"/>
        </table:table-row>
        <table:table-row table:style-name="ro1" table:number-rows-repeated="43">
          <table:table-cell table:style-name="ce5" table:number-columns-repeated="2"/>
          <table:table-cell table:content-validation-name="val1"/>
          <table:table-cell table:style-name="ce3"/>
          <table:table-cell table:number-columns-repeated="3"/>
          <table:table-cell table:style-name="Default" table:number-columns-repeated="16377"/>
        </table:table-row>
        <table:table-row table:style-name="ro1" table:number-rows-repeated="2">
          <table:table-cell table:style-name="ce5" table:number-columns-repeated="2"/>
          <table:table-cell table:content-validation-name="val1"/>
          <table:table-cell table:number-columns-repeated="4"/>
          <table:table-cell table:style-name="Default" table:number-columns-repeated="16377"/>
        </table:table-row>
        <table:table-row table:style-name="ro1">
          <table:table-cell table:style-name="ce5" table:number-columns-repeated="2"/>
          <table:table-cell table:content-validation-name="val1"/>
          <table:table-cell table:style-name="ce3"/>
          <table:table-cell table:number-columns-repeated="3"/>
          <table:table-cell table:style-name="Default" table:number-columns-repeated="16377"/>
        </table:table-row>
        <table:table-row table:style-name="ro1" table:number-rows-repeated="2">
          <table:table-cell table:number-columns-repeated="2"/>
          <table:table-cell table:content-validation-name="val1"/>
          <table:table-cell table:style-name="ce3"/>
          <table:table-cell table:number-columns-repeated="3"/>
          <table:table-cell table:style-name="Default" table:number-columns-repeated="16377"/>
        </table:table-row>
        <table:table-row table:style-name="ro1" table:number-rows-repeated="1048508">
          <table:table-cell table:number-columns-repeated="2"/>
          <table:table-cell table:content-validation-name="val1"/>
          <table:table-cell table:number-columns-repeated="4"/>
          <table:table-cell table:style-name="Default" table:number-columns-repeated="16377"/>
        </table:table-row>
        <table:table-row table:style-name="ro1">
          <table:table-cell table:number-columns-repeated="2"/>
          <table:table-cell table:content-validation-name="val1"/>
          <table:table-cell table:number-columns-repeated="4"/>
          <table:table-cell table:style-name="Default" table:number-columns-repeated="16377"/>
        </table:table-row>
      </table:table>
      <table:table table:name="Events" table:style-name="ta1">
        <table:table-column table:style-name="co8" table:number-columns-repeated="3" table:default-cell-style-name="ce18"/>
        <table:table-column table:style-name="co9" table:default-cell-style-name="ce14"/>
        <table:table-column table:style-name="co10" table:default-cell-style-name="ce35"/>
        <table:table-column table:style-name="co11" table:default-cell-style-name="ce38"/>
        <table:table-column table:style-name="co12" table:default-cell-style-name="ce35"/>
        <table:table-column table:style-name="co7" table:default-cell-style-name="ce35"/>
        <table:table-column table:style-name="co7" table:number-columns-repeated="3" table:default-cell-style-name="Default"/>
        <table:table-column table:style-name="co7" table:number-columns-repeated="16373"/>
        <table:table-row table:style-name="ro1">
          <table:table-cell table:style-name="ce14" office:value-type="string" calcext:value-type="string">
            <text:p>Received</text:p>
          </table:table-cell>
          <table:table-cell table:style-name="ce14" office:value-type="string" calcext:value-type="string">
            <text:p>Starts</text:p>
          </table:table-cell>
          <table:table-cell table:style-name="ce2" office:value-type="string" calcext:value-type="string">
            <text:p>Expires</text:p>
          </table:table-cell>
          <table:table-cell office:value-type="string" calcext:value-type="string">
            <text:p>Section</text:p>
          </table:table-cell>
          <table:table-cell table:style-name="ce14" office:value-type="string" calcext:value-type="string">
            <text:p>Title</text:p>
          </table:table-cell>
          <table:table-cell table:style-name="ce27" office:value-type="string" calcext:value-type="string">
            <text:p>Text</text:p>
          </table:table-cell>
          <table:table-cell table:style-name="ce14" office:value-type="string" calcext:value-type="string">
            <text:p>Image</text:p>
          </table:table-cell>
          <table:table-cell table:style-name="ce14" office:value-type="string" calcext:value-type="string">
            <text:p>notes</text:p>
          </table:table-cell>
          <table:table-cell table:number-columns-repeated="3"/>
          <table:table-cell table:style-name="ce14" table:number-columns-repeated="16373"/>
        </table:table-row>
        <table:table-row table:style-name="ro3">
          <table:table-cell table:style-name="ce30" office:value-type="date" office:date-value="2026-04-28" calcext:value-type="date">
            <text:p>04/28/26</text:p>
          </table:table-cell>
          <table:table-cell table:style-name="ce30" office:value-type="date" office:date-value="2026-05-01" calcext:value-type="date">
            <text:p>05/01/26</text:p>
          </table:table-cell>
          <table:table-cell table:style-name="ce30" office:value-type="date" office:date-value="2026-05-30" calcext:value-type="date">
            <text:p>05/30/26</text:p>
          </table:table-cell>
          <table:table-cell table:style-name="ce30" table:content-validation-name="val2" office:value-type="string" calcext:value-type="string">
            <text:p>Recurring</text:p>
          </table:table-cell>
          <table:table-cell table:style-name="ce34" office:value-type="string" calcext:value-type="string">
            <text:p>"When Do I Stop?" - A conceptual art exhibit </text:p>
          </table:table-cell>
          <table:table-cell office:value-type="string" calcext:value-type="string">
            <text:p>This event is open to the community with a suggested donation of $9 – $18. If you are joining via Zoom, the link will be provided upon registration. For more information or to sign up, please contact Colette at 575-707-2725.</text:p>
          </table:table-cell>
          <table:table-cell office:value-type="string" calcext:value-type="string">
            <text:p>When-Do-I-Stop.png</text:p>
          </table:table-cell>
          <table:table-cell table:number-columns-repeated="4"/>
          <table:table-cell table:style-name="ce14" table:number-columns-repeated="16373"/>
        </table:table-row>
        <table:table-row table:style-name="ro17">
          <table:table-cell table:style-name="ce30" office:value-type="date" office:date-value="2026-04-29" calcext:value-type="date">
            <text:p>04/29/26</text:p>
          </table:table-cell>
          <table:table-cell table:style-name="ce30" office:value-type="date" office:date-value="2026-05-11" calcext:value-type="date">
            <text:p>05/11/26</text:p>
          </table:table-cell>
          <table:table-cell table:style-name="ce30" office:value-type="date" office:date-value="2026-06-15" calcext:value-type="date">
            <text:p>06/15/26</text:p>
          </table:table-cell>
          <table:table-cell table:style-name="ce30" table:content-validation-name="val2" office:value-type="string" calcext:value-type="string">
            <text:p>Recurring</text:p>
          </table:table-cell>
          <table:table-cell table:style-name="ce34" office:value-type="string" calcext:value-type="string">
            <text:p>Aging Mastery </text:p>
          </table:table-cell>
          <table:table-cell office:value-type="string" calcext:value-type="string">
            <text:p>Starts Monday, May 11 | 12:30 PM – 2:00 PM and continues through Monday, June 15th, every Monday and Wednesday for 6 weeks, expect Memorial Day Monday.</text:p>
            <text:p>Looking to age well and stay independent? Join the Aging Mastery Program®, a 10-class series designed to empower older adults to make impactful changes that improve health, confidence, and overall well-being. Starting May 11th at the Cortez Senior Center, classes are held Mondays and Wednesdays from 12:30 to 2:00 PM—no class on Memorial Day. Each session features expert speakers covering topics like healthy eating, financial fitness, fall prevention, medication management, and more. Join a group of like-minded individuals, build lasting relationships, and take steps toward aging well. Space is limited to just 15 participants—sign up today by calling or emailing Lanea Donahoo at 970-564-4159 or  [lanea.Donahoo@colostate.edu](mailto:lanea.Donahoo@colostate.edu) </text:p>
            <text:p>Location Cortez Senior Center, 117 North Chestnut, Cortez, CO</text:p>
            <text:p/>
          </table:table-cell>
          <table:table-cell office:value-type="string" calcext:value-type="string">
            <text:p>Aging-Mastery-Flyer-2026.jpg</text:p>
          </table:table-cell>
          <table:table-cell table:number-columns-repeated="4"/>
          <table:table-cell table:style-name="ce14" table:number-columns-repeated="16373"/>
        </table:table-row>
        <table:table-row table:style-name="ro1">
          <table:table-cell table:style-name="ce30" office:value-type="date" office:date-value="2026-04-23" calcext:value-type="date">
            <text:p>04/23/26</text:p>
          </table:table-cell>
          <table:table-cell table:style-name="ce30" office:value-type="date" office:date-value="2026-05-16" calcext:value-type="date">
            <text:p>05/16/26</text:p>
          </table:table-cell>
          <table:table-cell table:style-name="ce30" office:value-type="date" office:date-value="2026-05-30" calcext:value-type="date">
            <text:p>05/30/26</text:p>
          </table:table-cell>
          <table:table-cell table:style-name="ce18" table:content-validation-name="val2" office:value-type="string" calcext:value-type="string">
            <text:p>Recurring</text:p>
          </table:table-cell>
          <table:table-cell table:style-name="ce34" office:value-type="string" calcext:value-type="string">
            <text:p>Team Up SW</text:p>
          </table:table-cell>
          <table:table-cell office:value-type="string" calcext:value-type="string">
            <text:p>Teen Hangout Night</text:p>
          </table:table-cell>
          <table:table-cell office:value-type="string" calcext:value-type="string">
            <text:p>Teen-Hangout-Night-Flyer-23.png</text:p>
          </table:table-cell>
          <table:table-cell table:number-columns-repeated="4"/>
          <table:table-cell table:style-name="ce14" table:number-columns-repeated="16373"/>
        </table:table-row>
        <table:table-row table:style-name="ro9">
          <table:table-cell table:number-columns-repeated="2" table:style-name="ce30" office:value-type="date" office:date-value="2026-05-22" calcext:value-type="date">
            <text:p>05/22/26</text:p>
          </table:table-cell>
          <table:table-cell table:style-name="ce30" office:value-type="date" office:date-value="2026-05-30" calcext:value-type="date">
            <text:p>05/30/26</text:p>
          </table:table-cell>
          <table:table-cell table:content-validation-name="val2" office:value-type="string" calcext:value-type="string">
            <text:p>Multiple</text:p>
          </table:table-cell>
          <table:table-cell table:style-name="ce34" office:value-type="string" calcext:value-type="string">
            <text:p>LWV Initiative #195 Petition Signing — Sunflower Theater</text:p>
          </table:table-cell>
          <table:table-cell office:value-type="string" calcext:value-type="string">
            <text:p>Petitions are circulating to get a Graduated Income Tax (GIT) on the fall ballot. Shifting away from a flat tax system will raise an estimated $2B annually to help mitigate shortfalls for education and healthcare. You must be an active registered Colorado voter to sign. Verify or update [registration](GoVoteColorado.gov).</text:p>
            <text:p/>
            <text:p>WHEN: Saturday, May 30, 2026 — 6:00 PM - 7:00 PM</text:p>
            <text:p/>
            <text:p>WHERE: Sunflower Theater</text:p>
          </table:table-cell>
          <table:table-cell/>
          <table:table-cell table:style-name="ce14"/>
          <table:table-cell table:number-columns-repeated="3"/>
          <table:table-cell table:style-name="ce14" table:number-columns-repeated="16373"/>
        </table:table-row>
        <table:table-row table:style-name="ro13">
          <table:table-cell table:number-columns-repeated="2" table:style-name="ce30" office:value-type="date" office:date-value="2026-05-22" calcext:value-type="date">
            <text:p>05/22/26</text:p>
          </table:table-cell>
          <table:table-cell table:style-name="ce30" office:value-type="date" office:date-value="2026-06-26" calcext:value-type="date">
            <text:p>06/26/26</text:p>
          </table:table-cell>
          <table:table-cell table:style-name="ce30" table:content-validation-name="val2" office:value-type="string" calcext:value-type="string">
            <text:p>Recurring</text:p>
          </table:table-cell>
          <table:table-cell table:style-name="ce34" office:value-type="string" calcext:value-type="string">
            <text:p>League of Women Voters: Indivisible Veterans Park Rallies</text:p>
          </table:table-cell>
          <table:table-cell office:value-type="string" calcext:value-type="string">
            <text:p>Indivisible Montezuma County will continue to SHOW UP for recurring community rallies on scheduled Saturdays throughout May and June. Bring a sign, bring a flag, and support live regional advocacy!</text:p>
            <text:p/>
            <text:p>Rally 1 WHEN: Saturday, May 30, 2026 — 10:00 AM - 12:00 PM</text:p>
            <text:p/>
            <text:p>Rally 2 WHEN: Saturday, June 13, 2026 — 10:00 AM - 12:00 PM</text:p>
            <text:p/>
            <text:p>Rally 3 WHEN: Saturday, June 27, 2026 — 10:00 AM - 12:00 PM</text:p>
            <text:p/>
            <text:p>WHERE: Veterans Park</text:p>
          </table:table-cell>
          <table:table-cell office:value-type="string" calcext:value-type="string">
            <text:p>Rallies-May-June-2026.jpg</text:p>
          </table:table-cell>
          <table:table-cell table:number-columns-repeated="4"/>
          <table:table-cell table:style-name="ce14" table:number-columns-repeated="16373"/>
        </table:table-row>
        <table:table-row table:style-name="ro10">
          <table:table-cell table:style-name="ce30" office:value-type="date" office:date-value="2026-04-30" calcext:value-type="date">
            <text:p>04/30/26</text:p>
          </table:table-cell>
          <table:table-cell table:style-name="ce30" office:value-type="date" office:date-value="2026-05-23" calcext:value-type="date">
            <text:p>05/23/26</text:p>
          </table:table-cell>
          <table:table-cell table:style-name="ce30" office:value-type="date" office:date-value="2026-05-30" calcext:value-type="date">
            <text:p>05/30/26</text:p>
          </table:table-cell>
          <table:table-cell table:style-name="ce30" table:content-validation-name="val2" office:value-type="string" calcext:value-type="string">
            <text:p>Single</text:p>
          </table:table-cell>
          <table:table-cell table:style-name="ce34" office:value-type="string" calcext:value-type="string">
            <text:p>Cortez Farmers Market</text:p>
          </table:table-cell>
          <table:table-cell office:value-type="string" calcext:value-type="string">
            <text:p>Cortez Farmers Market</text:p>
            <text:p/>
            <text:p>BONUS!!</text:p>
            <text:p/>
            <text:p>Four Corners Community Band will be playing on Opening Day of the Market. There’s no better place to be in the morning on  Saturday, May 30th!</text:p>
          </table:table-cell>
          <table:table-cell office:value-type="string" calcext:value-type="string">
            <text:p>Flier-Cortez-Farmers-Market-2026.jpg</text:p>
          </table:table-cell>
          <table:table-cell table:number-columns-repeated="4"/>
          <table:table-cell table:style-name="ce35" table:number-columns-repeated="16373"/>
        </table:table-row>
        <table:table-row table:style-name="ro8">
          <table:table-cell table:style-name="ce30" office:value-type="date" office:date-value="2026-04-30" calcext:value-type="date">
            <text:p>04/30/26</text:p>
          </table:table-cell>
          <table:table-cell table:style-name="ce30" office:value-type="date" office:date-value="2026-05-23" calcext:value-type="date">
            <text:p>05/23/26</text:p>
          </table:table-cell>
          <table:table-cell table:style-name="ce30" office:value-type="date" office:date-value="2026-05-30" calcext:value-type="date">
            <text:p>05/30/26</text:p>
          </table:table-cell>
          <table:table-cell table:style-name="ce30" table:content-validation-name="val2" office:value-type="string" calcext:value-type="string">
            <text:p>Single</text:p>
          </table:table-cell>
          <table:table-cell table:style-name="ce34" office:value-type="string" calcext:value-type="string">
            <text:p>Renew Fundraiser featuring Farm to Table Dinner, Wine &amp; Music</text:p>
          </table:table-cell>
          <table:table-cell office:value-type="string" calcext:value-type="string">
            <text:p>Join us for an elegant evening at the beautiful Sutcliffe Vineyards for a special farm-to-table fundraiser benefiting Renew Inc. On Saturday, May 30th from 4–8 p.m., guests will gather among rolling vines and golden light for a refined countryside experience in support of an essential cause.The evening will feature a thoughtfully curated farm dinner highlighting fresh, local ingredients, including seasonally inspired dishes. Guests will enjoy Sutcliffe’s acclaimed wines—consistently rated 90+ points by Wine Enthusiast—along with refreshing sangria, all served in the vineyard’s beautiful outdoor setting. Live music will set the tone as attendees mingle, savor the meal, and browse a curated silent fundraiser.</text:p>
            <text:p>Proceeds from this event will directly support Renew Inc.’s vital work providing a Safehouse and critical resources to survivors of domestic violence and sexual assault at a time when federal funding and grants have been significantly reduced. Your participation helps ensure that Renew can continue offering safety, healing, and hope to those who need it most.</text:p>
            <text:p/>
            <text:p>We invite you to an unforgettable evening of community, connection, and compassion—where good wine, good food, and a good cause come together.</text:p>
            <text:p/>
            <text:p>Questions? Email <text:a xlink:href="mailto:Lilyrusso@gmail.com" xlink:type="simple">Lilyrusso@gmail.com</text:a> </text:p>
            <text:p>Get Tickets - <text:a xlink:href="https://onwardfdn.fcsuite.com/erp/donate/list/event?event_date_id=1627" xlink:type="simple">https://onwardfdn.fcsuite.com/erp/donate/list/event?event_date_id=1627</text:a></text:p>
          </table:table-cell>
          <table:table-cell table:number-columns-repeated="5"/>
          <table:table-cell table:style-name="ce35" table:number-columns-repeated="16373"/>
        </table:table-row>
        <table:table-row table:style-name="ro15">
          <table:table-cell table:style-name="ce30" office:value-type="date" office:date-value="2026-05-22" calcext:value-type="date">
            <text:p>05/22/26</text:p>
          </table:table-cell>
          <table:table-cell table:style-name="ce30" office:value-type="date" office:date-value="2026-05-23" calcext:value-type="date">
            <text:p>05/23/26</text:p>
          </table:table-cell>
          <table:table-cell table:style-name="ce30" office:value-type="date" office:date-value="2026-05-31" calcext:value-type="date">
            <text:p>05/31/26</text:p>
          </table:table-cell>
          <table:table-cell table:content-validation-name="val2" office:value-type="string" calcext:value-type="string">
            <text:p>Multiple</text:p>
          </table:table-cell>
          <table:table-cell table:style-name="ce34" office:value-type="string" calcext:value-type="string">
            <text:p>LWV Initiative #195 Petition Signing — Mancos</text:p>
          </table:table-cell>
          <table:table-cell office:value-type="string" calcext:value-type="string">
            <text:p>Petitions are circulating to get a Graduated Income Tax (GIT) on the fall ballot. Currently Colorado has a flat tax which means that those making $20,000 in annual income are taxed at the same rate as those making over #500,000. If successful in getting this on the ballot and it passes, 97% of Coloradans will see a decrease or no change to their taxes. It is expected that $2B a year will be raised which will be earmarked for education (including teacher pay raises), childcare, and healthcare -- areas with current major shortfalls in our budget.</text:p>
            <text:p/>
            <text:p>The Colorado Legislature will determine how these additional funds will be allocated specifically to the earmarked areas. You must be an active registered Colorado voter to sign, though you do not need to live in Montezuma County. Check and update voter registration instantly at GoVoteColorado.gov.</text:p>
            <text:p/>
            <text:p>WHEN: Saturday, May 30, 2026 — 4:30 PM - 5:30 PM</text:p>
            <text:p/>
            <text:p>WHEN: Sunday, May 31, 2026 — 4:30 PM - 5:30 PM</text:p>
            <text:p/>
            <text:p>WHERE: Mancos Brewery</text:p>
          </table:table-cell>
          <table:table-cell/>
          <table:table-cell table:style-name="ce14"/>
          <table:table-cell table:number-columns-repeated="3"/>
          <table:table-cell table:style-name="ce35" table:number-columns-repeated="16373"/>
        </table:table-row>
        <table:table-row table:style-name="ro9">
          <table:table-cell table:style-name="ce30" office:value-type="date" office:date-value="2026-05-22" calcext:value-type="date">
            <text:p>05/22/26</text:p>
          </table:table-cell>
          <table:table-cell table:style-name="ce30" office:value-type="date" office:date-value="2026-05-24" calcext:value-type="date">
            <text:p>05/24/26</text:p>
          </table:table-cell>
          <table:table-cell table:style-name="ce30" office:value-type="date" office:date-value="2026-06-01" calcext:value-type="date">
            <text:p>06/01/26</text:p>
          </table:table-cell>
          <table:table-cell table:style-name="ce17" table:content-validation-name="val2" office:value-type="string" calcext:value-type="string">
            <text:p>Multiple</text:p>
          </table:table-cell>
          <table:table-cell table:style-name="ce34" office:value-type="string" calcext:value-type="string">
            <text:p>LWV Initiative #195 Petition Signing — Dolores Bike Hostel</text:p>
          </table:table-cell>
          <table:table-cell office:value-type="string" calcext:value-type="string">
            <text:p>Petitions are circulating to get a Graduated Income Tax (GIT) on the fall ballot. Registered Colorado voters can drop by to provide signatures to get this measure on the ballot for education funding and childcare revenue. Verify status via GoVoteColorado.gov.</text:p>
            <text:p/>
            <text:p>WHEN: Monday, June 1, 2026 — 7:00 PM - 8:00 PM</text:p>
            <text:p/>
            <text:p>WHERE: Dolores Bike Hostel</text:p>
          </table:table-cell>
          <table:table-cell table:number-columns-repeated="5"/>
          <table:table-cell table:style-name="ce35" table:number-columns-repeated="16373"/>
        </table:table-row>
        <table:table-row table:style-name="ro18">
          <table:table-cell table:style-name="ce30" office:value-type="date" office:date-value="2026-05-10" calcext:value-type="date">
            <text:p>05/10/26</text:p>
          </table:table-cell>
          <table:table-cell table:style-name="ce30" office:value-type="date" office:date-value="2026-05-25" calcext:value-type="date">
            <text:p>05/25/26</text:p>
          </table:table-cell>
          <table:table-cell table:style-name="ce30" office:value-type="date" office:date-value="2026-05-31" calcext:value-type="date">
            <text:p>05/31/26</text:p>
          </table:table-cell>
          <table:table-cell table:style-name="ce30" table:content-validation-name="val2" office:value-type="string" calcext:value-type="string">
            <text:p>Multiple</text:p>
          </table:table-cell>
          <table:table-cell table:style-name="ce34" office:value-type="string" calcext:value-type="string">
            <text:p>SCYC Mancos Summer Programs</text:p>
          </table:table-cell>
          <table:table-cell office:value-type="string" calcext:value-type="string">
            <text:p>Week 2 of the SCYC Mancos Summer Programs kicks off Monday, June 1st and runs through Thursday, June 4th from 12:00 PM to 4:00 PM. Programs include Angela's Elementary Adventures (Grades K-2nd), Coding (Grades 2nd-7th), and Theatre Arts (Grades 2nd-12th). Scan the QR code on the flyer to register.</text:p>
          </table:table-cell>
          <table:table-cell office:value-type="string" calcext:value-type="string">
            <text:p>2026-KIDS-summer-camp.png</text:p>
          </table:table-cell>
          <table:table-cell table:number-columns-repeated="4"/>
          <table:table-cell table:style-name="ce35" table:number-columns-repeated="16373"/>
        </table:table-row>
        <table:table-row table:style-name="ro13">
          <table:table-cell table:style-name="ce30" office:value-type="date" office:date-value="2026-05-22" calcext:value-type="date">
            <text:p>05/22/26</text:p>
          </table:table-cell>
          <table:table-cell table:style-name="ce30" office:value-type="date" office:date-value="2026-05-25" calcext:value-type="date">
            <text:p>05/25/26</text:p>
          </table:table-cell>
          <table:table-cell table:style-name="ce30" office:value-type="date" office:date-value="2026-06-02" calcext:value-type="date">
            <text:p>06/02/26</text:p>
          </table:table-cell>
          <table:table-cell table:style-name="ce30" table:content-validation-name="val2" office:value-type="string" calcext:value-type="string">
            <text:p>Multiple</text:p>
          </table:table-cell>
          <table:table-cell table:style-name="ce12" office:value-type="string" calcext:value-type="string">
            <text:p>League of Women Voters: Republican Primary Candidate Forum – Montezuma County </text:p>
          </table:table-cell>
          <table:table-cell office:value-type="string" calcext:value-type="string">
            <text:p>The Montezuma County League of Women Voters is hosting a candidate forum for the upcoming Republican Primary. This is an opportunity for local voters to hear directly from candidates seeking county leadership roles.</text:p>
            <text:p/>
            <text:p>WHEN: June 3, 2026 — 6:00 PM - 8:00 PM</text:p>
            <text:p/>
            <text:p>WHERE: Montezuma County Annex, 107 N. Chestnut St.</text:p>
            <text:p/>
            <text:p>County Clerk &amp; Recorder Candidates: Jerri Frizzell, Lenetta Shull</text:p>
            <text:p/>
            <text:p>County Commissioner Candidates: Bonnie Anderson, Rodney Cox, Diane Fox-Spratlen</text:p>
          </table:table-cell>
          <table:table-cell table:number-columns-repeated="5"/>
          <table:table-cell table:style-name="ce35" table:number-columns-repeated="16373"/>
        </table:table-row>
        <table:table-row table:style-name="ro19">
          <table:table-cell table:style-name="ce30" office:value-type="date" office:date-value="2026-05-29" calcext:value-type="date">
            <text:p>05/29/26</text:p>
          </table:table-cell>
          <table:table-cell table:style-name="ce30" office:value-type="date" office:date-value="2026-05-25" calcext:value-type="date">
            <text:p>05/25/26</text:p>
          </table:table-cell>
          <table:table-cell table:style-name="ce30" office:value-type="date" office:date-value="2026-06-02" calcext:value-type="date">
            <text:p>06/02/26</text:p>
          </table:table-cell>
          <table:table-cell table:style-name="ce22" table:content-validation-name="val2" office:value-type="string" calcext:value-type="string">
            <text:p>Single</text:p>
          </table:table-cell>
          <table:table-cell table:style-name="ce3" office:value-type="string" calcext:value-type="string">
            <text:p>Double Workshop: Invasive Pest Management and Noxious Weed Control</text:p>
          </table:table-cell>
          <table:table-cell table:style-name="ce3" office:value-type="string" calcext:value-type="string">
            <text:p>Join the Mancos Conservation District for a 2-for-1 workshop on Wednesday, June 3rd at Fozzie’s Farm (19760 Rd W, Lewis, CO). A $5 Registration Fee is required by 6/1/26 so we can get an accurate count for lunch. Please share any dietary restrictions with [Hannah](<text:a xlink:href="mailto:hannah.voye@co.nacdnet.net" xlink:type="simple">hannah.voye@co.nacdnet.net</text:a>).</text:p>
            <text:p/>
            <text:p>Schedule:</text:p>
            <text:p/>
            <text:p>11:00 AM - 12:30 PM | Workshop #1 - Integrated Pest Management: Learn from engaging entomologist Mel Schreiner, CSU Extension Tri-River Area. She will help us identify insects and lead discussions on the important role they play in our environment and agriculture.</text:p>
            <text:p/>
            <text:p>12:30 PM - 1:00 PM | Lunch: Provided by Mona Makes! Traditional lasagna with handmade noodles, steamed broccoli, garden salad, homemade breadsticks, and dessert.</text:p>
            <text:p/>
            <text:p>1:30 PM - 3:00 PM | Workshop #2 - Noxious Weed Control: Montezuma County's own Emily Lockard, with CSU Extension, will lead a talk and walk to help identify and discuss treatment options for local weed concerns.</text:p>
            <text:p/>
            <text:p>Event hosted by: Montezuma Land Conservancy, Colorado State University Extension, High Desert Conservation District, Mona Makes, and Mancos Conservation District.</text:p>
          </table:table-cell>
          <table:table-cell table:style-name="ce12" office:value-type="string" calcext:value-type="string">
            <text:p>IPM-NWC-Flyer.jpg </text:p>
          </table:table-cell>
          <table:table-cell table:number-columns-repeated="4"/>
          <table:table-cell table:style-name="ce35" table:number-columns-repeated="16373"/>
        </table:table-row>
        <table:table-row table:style-name="ro18">
          <table:table-cell table:number-columns-repeated="2" table:style-name="ce30" office:value-type="date" office:date-value="2026-05-26" calcext:value-type="date">
            <text:p>05/26/26</text:p>
          </table:table-cell>
          <table:table-cell office:value-type="date" office:date-value="2026-06-02" calcext:value-type="date">
            <text:p>06/02/26</text:p>
          </table:table-cell>
          <table:table-cell table:style-name="ce17" table:content-validation-name="val2" office:value-type="string" calcext:value-type="string">
            <text:p>Single</text:p>
          </table:table-cell>
          <table:table-cell table:style-name="ce34" office:value-type="string" calcext:value-type="string">
            <text:p>Poetry Workshop at Mancos Library</text:p>
          </table:table-cell>
          <table:table-cell table:style-name="ce9" office:value-type="string" calcext:value-type="string">
            <text:p>Next Tuesday 6/2, poet Geneva Toland will be leading a FREE poetry workshop at the Mancos public library from 6-8pm, in partnership with Four Corners Writers. No writing experience necessary -- open to anyone who wants to explore and create with language! Come out and write!</text:p>
          </table:table-cell>
          <table:table-cell office:value-type="string" calcext:value-type="string">
            <text:p>Poetry_workshop_flyer_Mancos.jpg</text:p>
          </table:table-cell>
          <table:table-cell table:number-columns-repeated="4"/>
          <table:table-cell table:style-name="ce35" table:number-columns-repeated="16373"/>
        </table:table-row>
        <table:table-row table:style-name="ro1">
          <table:table-cell table:style-name="ce30" office:value-type="date" office:date-value="2026-05-20" calcext:value-type="date">
            <text:p>05/20/26</text:p>
          </table:table-cell>
          <table:table-cell table:style-name="ce30" office:value-type="date" office:date-value="2026-05-26" calcext:value-type="date">
            <text:p>05/26/26</text:p>
          </table:table-cell>
          <table:table-cell office:value-type="date" office:date-value="2026-06-02" calcext:value-type="date">
            <text:p>06/02/26</text:p>
          </table:table-cell>
          <table:table-cell table:style-name="ce17" table:content-validation-name="val2" office:value-type="string" calcext:value-type="string">
            <text:p>Single</text:p>
          </table:table-cell>
          <table:table-cell table:style-name="ce12" office:value-type="string" calcext:value-type="string">
            <text:p>Invasive Pest Management and Noxious Weed Control</text:p>
          </table:table-cell>
          <table:table-cell office:value-type="string" calcext:value-type="string">
            <text:p>Double Workshop at Fozzie’s Farm – see the flyer for details</text:p>
          </table:table-cell>
          <table:table-cell office:value-type="string" calcext:value-type="string">
            <text:p>IPM-NWC-Flyer.png</text:p>
          </table:table-cell>
          <table:table-cell table:number-columns-repeated="4"/>
          <table:table-cell table:style-name="ce35" table:number-columns-repeated="16373"/>
        </table:table-row>
        <table:table-row table:style-name="ro5">
          <table:table-cell table:style-name="ce30" office:value-type="date" office:date-value="2026-05-18" calcext:value-type="date">
            <text:p>05/18/26</text:p>
          </table:table-cell>
          <table:table-cell table:style-name="ce30" office:value-type="date" office:date-value="2026-05-26" calcext:value-type="date">
            <text:p>05/26/26</text:p>
          </table:table-cell>
          <table:table-cell table:style-name="ce30" office:value-type="date" office:date-value="2026-06-05" calcext:value-type="date">
            <text:p>06/05/26</text:p>
          </table:table-cell>
          <table:table-cell table:style-name="ce18" table:content-validation-name="val2" office:value-type="string" calcext:value-type="string">
            <text:p>Single</text:p>
          </table:table-cell>
          <table:table-cell table:style-name="ce34" office:value-type="string" calcext:value-type="string">
            <text:p>Cortez Historic Preservation Walking Tours</text:p>
          </table:table-cell>
          <table:table-cell office:value-type="string" calcext:value-type="string">
            <text:p>Cortez, CO – The City of Cortez Historic Preservation Board will host free historical walking tours on Saturday, June 6.</text:p>
            <text:p>Two guided tours will be available:</text:p>
            <text:p>•            Downtown District Walking Tour: A stroll along Main Street exploring the businesses and events that shaped Cortez’s early commercial development.</text:p>
            <text:p>•            Historic Montezuma Avenue Walking Tour: A look at the history and stories behind the homes along Montezuma Avenue.</text:p>
            <text:p> </text:p>
            <text:p>Both tours last between one hour to 90 minutes.</text:p>
            <text:p>Registration is required, but participation is free. Interested participants should reserve a ticket ahead of time via the links below or calling the Montezuma Heritage Museum at (970) 516 -1100. Eventbrite registration link: <text:a xlink:href="https://www.eventbrite.com/o/121076208969" xlink:type="simple">https://www.eventbrite.com/o/121076208969</text:a></text:p>
            <text:p> </text:p>
            <text:p>A suggested donation of $5 will benefit the Montezuma Heritage Museum and may be provided at the time of the tour.</text:p>
            <text:p>•            Saturday, June 6</text:p>
            <text:p>o            Downtown District Tour: 10:00 AM</text:p>
            <text:p>o            Montezuma Avenue Tour: 1:00 PM</text:p>
            <text:p> </text:p>
            <text:p>All tours begin at the Montezuma Heritage Museum at 35 South Chestnut Street.</text:p>
            <text:p>Participants are reminded to wear comfortable shoes, sun protection and bring a bottle of water and your curiosity.</text:p>
            <text:p> </text:p>
            <text:p>For more information on the events for Historic Preservation Days, please visit: <text:a xlink:href="https://linkprotect.cudasvc.com/url?a=https%3A%2F%2Fwww.cortezco.gov%2F909%2FHistoric-Preservation-Days&amp;c=E,1,0G9T7tcvSmlnNx4phB9XtCamiHVYxEa5f6HgLfKWbCfgWbEnOkpypVq8XuLOQKvGGvd2bUIZsFEsnfetSiW_APpfXA6KmuGfjDOzqXalJxWPuG0yjh0M9gvTLXJhfA,,&amp;typo=1" xlink:type="simple">https://www.cortezco.gov/909/Historic-Preservation-Days</text:a></text:p>
            <text:p/>
          </table:table-cell>
          <table:table-cell office:value-type="string" calcext:value-type="string">
            <text:p>Historic-Walking-Tours-2026.png</text:p>
          </table:table-cell>
          <table:table-cell table:number-columns-repeated="4"/>
          <table:table-cell table:style-name="ce35" table:number-columns-repeated="16373"/>
        </table:table-row>
        <table:table-row table:style-name="ro14">
          <table:table-cell table:style-name="ce30" office:value-type="date" office:date-value="2026-05-20" calcext:value-type="date">
            <text:p>05/20/26</text:p>
          </table:table-cell>
          <table:table-cell table:style-name="ce30" office:value-type="date" office:date-value="2026-05-26" calcext:value-type="date">
            <text:p>05/26/26</text:p>
          </table:table-cell>
          <table:table-cell office:value-type="date" office:date-value="2026-06-06" calcext:value-type="date">
            <text:p>06/06/26</text:p>
          </table:table-cell>
          <table:table-cell table:style-name="ce17" table:content-validation-name="val2" office:value-type="string" calcext:value-type="string">
            <text:p>Single</text:p>
          </table:table-cell>
          <table:table-cell table:style-name="ce12" office:value-type="string" calcext:value-type="string">
            <text:p>Poetry Workshop with Durango Poet Laureate Esther Belin </text:p>
          </table:table-cell>
          <table:table-cell table:style-name="ce9" office:value-type="string" calcext:value-type="string">
            <text:p>Join Esther Belin, the inaugural Poet Laureate of Durango, for an inspiring poetry workshop on Saturday, June 6th from 3:00–5:00 PM at the Sunflower Theater! Drawing on the work of Indigenous poets and other writers, participants will generate their own poems celebrating the places we call home. No writing experience necessary! Ages 13+ welcome. Register here: <text:a xlink:href="https://sunflowertheatre.org/product/a-place-we-call-home-poetry-workshop-with-esther-belin/" xlink:type="simple">https://sunflowertheatre.org/product/a-place-we-call-home-poetry-workshop-with-esther-belin/</text:a>  </text:p>
          </table:table-cell>
          <table:table-cell office:value-type="string" calcext:value-type="string">
            <text:p>Esther-sunflower-workshop.png</text:p>
          </table:table-cell>
          <table:table-cell table:number-columns-repeated="4"/>
          <table:table-cell table:style-name="ce35" table:number-columns-repeated="16373"/>
        </table:table-row>
        <table:table-row table:style-name="ro9">
          <table:table-cell table:style-name="ce30" office:value-type="date" office:date-value="2026-05-20" calcext:value-type="date">
            <text:p>05/20/26</text:p>
          </table:table-cell>
          <table:table-cell table:style-name="ce30" office:value-type="date" office:date-value="2026-05-26" calcext:value-type="date">
            <text:p>05/26/26</text:p>
          </table:table-cell>
          <table:table-cell office:value-type="date" office:date-value="2026-06-06" calcext:value-type="date">
            <text:p>06/06/26</text:p>
          </table:table-cell>
          <table:table-cell table:style-name="ce17" table:content-validation-name="val2" office:value-type="string" calcext:value-type="string">
            <text:p>Single</text:p>
          </table:table-cell>
          <table:table-cell table:style-name="ce12" office:value-type="string" calcext:value-type="string">
            <text:p>Indigenous Poetry Reading at the Sunflower </text:p>
          </table:table-cell>
          <table:table-cell office:value-type="string" calcext:value-type="string">
            <text:p>Join us for an evening of powerful poetry and storytelling with local Indigenous poets Kirbie Bennett, Eirene Hamilton, and Esther Belin on Saturday, June 6th at the Sunflower Theater from 7-8:30pm.</text:p>
            <text:p/>
            <text:p>In celebration of the theme “A Place We Call Home,” these three acclaimed Diné poets will share original work exploring identity, land, language, memory, and belonging. No matter your familiarity with poetry, this evening offers an opportunity to hear deeply rooted, moving, and inspiring voices from our region.</text:p>
            <text:p>Tickets are sliding scale $15-$25, and can be found here: <text:a xlink:href="https://sunflowertheatre.org/product/8347/" xlink:type="simple">https://sunflowertheatre.org/product/8347/</text:a> </text:p>
          </table:table-cell>
          <table:table-cell office:value-type="string" calcext:value-type="string">
            <text:p>Indigenous-poetry-reading.png</text:p>
          </table:table-cell>
          <table:table-cell table:number-columns-repeated="4"/>
          <table:table-cell table:style-name="ce35" table:number-columns-repeated="16373"/>
        </table:table-row>
        <table:table-row table:style-name="ro18">
          <table:table-cell table:style-name="ce30" office:value-type="date" office:date-value="2026-04-21" calcext:value-type="date">
            <text:p>04/21/26</text:p>
          </table:table-cell>
          <table:table-cell table:style-name="ce30" office:value-type="date" office:date-value="2026-05-26" calcext:value-type="date">
            <text:p>05/26/26</text:p>
          </table:table-cell>
          <table:table-cell table:style-name="ce30" office:value-type="date" office:date-value="2026-06-18" calcext:value-type="date">
            <text:p>06/18/26</text:p>
          </table:table-cell>
          <table:table-cell table:style-name="ce18" table:content-validation-name="val2" office:value-type="string" calcext:value-type="string">
            <text:p>Recurring</text:p>
          </table:table-cell>
          <table:table-cell table:style-name="ce34" office:value-type="string" calcext:value-type="string">
            <text:p>City of Cortez April/May Events and Info </text:p>
          </table:table-cell>
          <table:table-cell office:value-type="string" calcext:value-type="string">
            <text:p>City Council Meeting</text:p>
            <text:p> </text:p>
            <text:p>Third Thursdays begin June 18th – meet us in Montezuma Park!</text:p>
          </table:table-cell>
          <table:table-cell office:value-type="string" calcext:value-type="string">
            <text:p>2026-Third-Thursdays.jpg</text:p>
          </table:table-cell>
          <table:table-cell table:number-columns-repeated="4"/>
          <table:table-cell table:style-name="ce35" table:number-columns-repeated="16373"/>
        </table:table-row>
        <table:table-row table:style-name="ro3">
          <table:table-cell table:style-name="ce30" office:value-type="date" office:date-value="2026-05-10" calcext:value-type="date">
            <text:p>05/10/26</text:p>
          </table:table-cell>
          <table:table-cell table:style-name="ce30" office:value-type="date" office:date-value="2026-05-27" calcext:value-type="date">
            <text:p>05/27/26</text:p>
          </table:table-cell>
          <table:table-cell table:style-name="ce30" office:value-type="date" office:date-value="2026-06-04" calcext:value-type="date">
            <text:p>06/04/26</text:p>
          </table:table-cell>
          <table:table-cell table:style-name="ce18" table:content-validation-name="val2" office:value-type="string" calcext:value-type="string">
            <text:p>Single</text:p>
          </table:table-cell>
          <table:table-cell table:style-name="ce34" office:value-type="string" calcext:value-type="string">
            <text:p>Medicine Horse Field Trip</text:p>
          </table:table-cell>
          <table:table-cell office:value-type="string" calcext:value-type="string">
            <text:p>SCYC is hosting a Medicine Horse Field Trip on Friday, June 5th from 9:00 AM to 1:00 PM! Space is limited to 15 students total, and is open to 2nd graders and older. Scan the QR code on the flyer to register before spots fill up!</text:p>
          </table:table-cell>
          <table:table-cell office:value-type="string" calcext:value-type="string">
            <text:p>2026-KIDS-summer-camp.png</text:p>
          </table:table-cell>
          <table:table-cell table:number-columns-repeated="4"/>
          <table:table-cell table:style-name="ce35" table:number-columns-repeated="16373"/>
        </table:table-row>
        <table:table-row table:style-name="ro14">
          <table:table-cell table:style-name="ce17" office:value-type="date" office:date-value="2026-05-29" calcext:value-type="date">
            <text:p>05/29/26</text:p>
          </table:table-cell>
          <table:table-cell table:style-name="ce30" office:value-type="date" office:date-value="2026-05-27" calcext:value-type="date">
            <text:p>05/27/26</text:p>
          </table:table-cell>
          <table:table-cell table:style-name="ce30" office:value-type="date" office:date-value="2026-06-04" calcext:value-type="date">
            <text:p>06/04/26</text:p>
          </table:table-cell>
          <table:table-cell table:style-name="ce30" table:content-validation-name="val2" office:value-type="string" calcext:value-type="string">
            <text:p>Recurring</text:p>
          </table:table-cell>
          <table:table-cell table:style-name="ce12" office:value-type="string" calcext:value-type="string">
            <text:p>Mancos Valley Farmers Market </text:p>
          </table:table-cell>
          <table:table-cell office:value-type="string" calcext:value-type="string">
            <text:p>The Mancos Valley Farmers market starts next week on Thursday, June 4th from 4 pm to 6:30pm....</text:p>
            <text:p>Support your local farmers by picking up fresh seasonal veggies, baked goods, local eggs, art, and more!!</text:p>
            <text:p/>
            <text:p>Thank you Mancos Valley Farmers Market for this cherished weekly event! See you at Boyle park!</text:p>
          </table:table-cell>
          <table:table-cell office:value-type="string" calcext:value-type="string">
            <text:p>Mancos-Farmers-Market.png</text:p>
          </table:table-cell>
          <table:table-cell table:number-columns-repeated="4"/>
          <table:table-cell table:style-name="ce35" table:number-columns-repeated="16373"/>
        </table:table-row>
        <table:table-row table:style-name="ro1">
          <table:table-cell table:number-columns-repeated="2" table:style-name="ce30" office:value-type="date" office:date-value="2026-05-28" calcext:value-type="date">
            <text:p>05/28/26</text:p>
          </table:table-cell>
          <table:table-cell table:style-name="ce30" office:value-type="date" office:date-value="2026-05-30" calcext:value-type="date">
            <text:p>05/30/26</text:p>
          </table:table-cell>
          <table:table-cell table:style-name="ce17" table:content-validation-name="val2" office:value-type="string" calcext:value-type="string">
            <text:p>Single</text:p>
          </table:table-cell>
          <table:table-cell table:style-name="ce34" office:value-type="string" calcext:value-type="string">
            <text:p>Home Buyer Class in Cortez this Saturday</text:p>
          </table:table-cell>
          <table:table-cell office:value-type="string" calcext:value-type="string">
            <text:p>We still have some spots available this Saturday for our HBE class that I would love to fill. – See Flyer</text:p>
          </table:table-cell>
          <table:table-cell office:value-type="string" calcext:value-type="string">
            <text:p>Cortez-HBE.jpg</text:p>
          </table:table-cell>
          <table:table-cell table:style-name="ce14"/>
          <table:table-cell table:number-columns-repeated="3"/>
          <table:table-cell table:style-name="ce35" table:number-columns-repeated="16373"/>
        </table:table-row>
        <table:table-row table:style-name="ro20">
          <table:table-cell table:style-name="ce30" office:value-type="date" office:date-value="2026-05-20" calcext:value-type="date">
            <text:p>05/20/26</text:p>
          </table:table-cell>
          <table:table-cell table:style-name="ce30" table:formula="of:=[.C23]-7" office:value-type="date" office:date-value="2026-05-28" calcext:value-type="date">
            <text:p>05/28/26</text:p>
          </table:table-cell>
          <table:table-cell table:style-name="ce30" office:value-type="date" office:date-value="2026-06-04" calcext:value-type="date">
            <text:p>06/04/26</text:p>
          </table:table-cell>
          <table:table-cell table:style-name="ce18" table:content-validation-name="val2" office:value-type="string" calcext:value-type="string">
            <text:p>Single</text:p>
          </table:table-cell>
          <table:table-cell table:style-name="ce34" office:value-type="string" calcext:value-type="string">
            <text:p>Summer Reading Kick-Off Party </text:p>
          </table:table-cell>
          <table:table-cell office:value-type="string" calcext:value-type="string">
            <text:p>With Summer rapidly approaching, it's about time for our favorite time of the year, Summer Reading!Join us at the Cortez Public Library on Thursday, June 4th, from 4-6 pm for our Summer Reading Kickoff Party. We'll have treats, crafts, face painting, minigolf, and more.It's also a great chance for Kids, Teens, &amp; Adults to sign up for one of our Summer Reading Logs. Kids &amp; Teens will get a free book upon sign-up.Anyone of all ages who turns in their log by the end of July will be entered into a drawing to win one of our Grand Prizes! </text:p>
          </table:table-cell>
          <table:table-cell office:value-type="string" calcext:value-type="string">
            <text:p>Summer-Reading-Kickoff-2026.png</text:p>
          </table:table-cell>
          <table:table-cell table:number-columns-repeated="4"/>
          <table:table-cell table:style-name="ce35" table:number-columns-repeated="16373"/>
        </table:table-row>
        <table:table-row table:style-name="ro18">
          <table:table-cell table:style-name="ce30" office:value-type="date" office:date-value="2026-05-19" calcext:value-type="date">
            <text:p>05/19/26</text:p>
          </table:table-cell>
          <table:table-cell table:style-name="ce30" office:value-type="date" office:date-value="2026-05-28" calcext:value-type="date">
            <text:p>05/28/26</text:p>
          </table:table-cell>
          <table:table-cell table:style-name="ce30" office:value-type="date" office:date-value="2026-06-04" calcext:value-type="date">
            <text:p>06/04/26</text:p>
          </table:table-cell>
          <table:table-cell table:style-name="ce30" table:content-validation-name="val2" office:value-type="string" calcext:value-type="string">
            <text:p>Recurring</text:p>
          </table:table-cell>
          <table:table-cell table:style-name="ce16" office:value-type="string" calcext:value-type="string">
            <text:p>Family Adult Craft Nights</text:p>
          </table:table-cell>
          <table:table-cell office:value-type="string" calcext:value-type="string">
            <text:p>Adult Craft Nights are held on the first Thursday of each month at Mt.Lookout Grange in Mancos, CO. Registration is required (at <text:a xlink:href="http://abbyjfox.com/" xlink:type="simple">abbyjfox.com</text:a>) and donations are greatly appreciated!</text:p>
            <text:p>*June 4 Family Crafternoon, 4:30-5:30Mandala river rocks  </text:p>
          </table:table-cell>
          <table:table-cell office:value-type="string" calcext:value-type="string">
            <text:p>Adult-Craft-Nights-Family.jpg</text:p>
          </table:table-cell>
          <table:table-cell table:number-columns-repeated="4"/>
          <table:table-cell table:style-name="ce35" table:number-columns-repeated="16373"/>
        </table:table-row>
        <table:table-row table:style-name="ro18">
          <table:table-cell table:style-name="ce30" office:value-type="date" office:date-value="2026-05-19" calcext:value-type="date">
            <text:p>05/19/26</text:p>
          </table:table-cell>
          <table:table-cell table:style-name="ce30" office:value-type="date" office:date-value="2026-05-28" calcext:value-type="date">
            <text:p>05/28/26</text:p>
          </table:table-cell>
          <table:table-cell table:style-name="ce30" office:value-type="date" office:date-value="2026-06-04" calcext:value-type="date">
            <text:p>06/04/26</text:p>
          </table:table-cell>
          <table:table-cell table:style-name="ce18" table:content-validation-name="val2" office:value-type="string" calcext:value-type="string">
            <text:p>Recurring</text:p>
          </table:table-cell>
          <table:table-cell table:style-name="ce12" office:value-type="string" calcext:value-type="string">
            <text:p>Adult Craft Nights</text:p>
          </table:table-cell>
          <table:table-cell office:value-type="string" calcext:value-type="string">
            <text:p>Adult Craft Nights are held on the first Thursday of each month at Mt.Lookout Grange in Mancos, CO. Registration is required (at <text:a xlink:href="http://abbyjfox.com/" xlink:type="simple">abbyjfox.com</text:a>) and donations are greatly appreciated!</text:p>
            <text:p>*June 4 Adult Craft Night, 6-7:30Mandala river rocks </text:p>
          </table:table-cell>
          <table:table-cell office:value-type="string" calcext:value-type="string">
            <text:p>Adult-Craft-Nights.jpg</text:p>
          </table:table-cell>
          <table:table-cell table:number-columns-repeated="4"/>
          <table:table-cell table:style-name="ce35" table:number-columns-repeated="16373"/>
        </table:table-row>
        <table:table-row table:style-name="ro18">
          <table:table-cell table:style-name="ce30" office:value-type="date" office:date-value="2026-05-06" calcext:value-type="date">
            <text:p>05/06/26</text:p>
          </table:table-cell>
          <table:table-cell table:style-name="ce30" office:value-type="date" office:date-value="2026-05-28" calcext:value-type="date">
            <text:p>05/28/26</text:p>
          </table:table-cell>
          <table:table-cell table:style-name="ce30" office:value-type="date" office:date-value="2026-06-04" calcext:value-type="date">
            <text:p>06/04/26</text:p>
          </table:table-cell>
          <table:table-cell table:style-name="ce17" table:content-validation-name="val2" office:value-type="string" calcext:value-type="string">
            <text:p>Single</text:p>
          </table:table-cell>
          <table:table-cell table:style-name="ce34" office:value-type="string" calcext:value-type="string">
            <text:p>Haunted Like Human Returns</text:p>
          </table:table-cell>
          <table:table-cell office:value-type="string" calcext:value-type="string">
            <text:p>Nashville duo Haunted Like Human is back on Thursday, June 4th at 7:30 PM. Known for their inspired songwriting, sparse arrangements, and frisson-inducing harmonies, they craft deeply moving, lyric-driven stories with the careful detail of a novelist. For tickets and info, visit doloresriverbrewery.com.</text:p>
          </table:table-cell>
          <table:table-cell table:number-columns-repeated="5"/>
          <table:table-cell table:style-name="ce35" table:number-columns-repeated="16373"/>
        </table:table-row>
        <table:table-row table:style-name="ro10">
          <table:table-cell table:style-name="ce30" office:value-type="date" office:date-value="2026-05-05" calcext:value-type="date">
            <text:p>05/05/26</text:p>
          </table:table-cell>
          <table:table-cell table:style-name="ce30" office:value-type="date" office:date-value="2026-05-28" calcext:value-type="date">
            <text:p>05/28/26</text:p>
          </table:table-cell>
          <table:table-cell table:style-name="ce30" office:value-type="date" office:date-value="2026-06-05" calcext:value-type="date">
            <text:p>06/05/26</text:p>
          </table:table-cell>
          <table:table-cell table:style-name="ce30" table:content-validation-name="val2" office:value-type="string" calcext:value-type="string">
            <text:p>Single</text:p>
          </table:table-cell>
          <table:table-cell table:style-name="ce34" office:value-type="string" calcext:value-type="string">
            <text:p>National Trails Day in Montezuma County</text:p>
          </table:table-cell>
          <table:table-cell office:value-type="string" calcext:value-type="string">
            <text:p>Join Mancos Trails Group and Osprey Packs in celebrating American Hiking Society’s National Trails Day! Give back to the trails you love on Saturday, June 6th with a trail maintenance volunteer event near you. Mancos Trails Group is hosting an event at Upper Chicken Creek Trailhead from 8:30am-3pm, lunch and drinks will be provided after the trail work. Participate for a chance to win some gear from Osprey Packs!</text:p>
            <text:p/>
            <text:p>Find an event near you and sign up at: <text:a xlink:href="https://americanhiking.org/national-trails-day/find-an-event/" xlink:type="simple">https://americanhiking.org/national-trails-day/find-an-event/</text:a></text:p>
          </table:table-cell>
          <table:table-cell table:number-columns-repeated="5"/>
          <table:table-cell table:style-name="ce35" table:number-columns-repeated="16373"/>
        </table:table-row>
        <table:table-row table:style-name="ro21">
          <table:table-cell table:style-name="ce30" office:value-type="date" office:date-value="2026-05-22" calcext:value-type="date">
            <text:p>05/22/26</text:p>
          </table:table-cell>
          <table:table-cell table:style-name="ce30" office:value-type="date" office:date-value="2026-05-28" calcext:value-type="date">
            <text:p>05/28/26</text:p>
          </table:table-cell>
          <table:table-cell table:style-name="ce30" office:value-type="date" office:date-value="2026-06-05" calcext:value-type="date">
            <text:p>06/05/26</text:p>
          </table:table-cell>
          <table:table-cell table:content-validation-name="val2" office:value-type="string" calcext:value-type="string">
            <text:p>Multiple</text:p>
          </table:table-cell>
          <table:table-cell table:style-name="ce34" office:value-type="string" calcext:value-type="string">
            <text:p>League of Women Voters: Legislative Update Event</text:p>
          </table:table-cell>
          <table:table-cell office:value-type="string" calcext:value-type="string">
            <text:p>CO Representative Katie Stewart and CO Senator Cleave Simpson will report on the challenges they have faced balancing the state budget and address state issues of importance to Coloradans. Live event at the Cortez Public Library.</text:p>
            <text:p/>
            <text:p>WHEN: Saturday, June 6, 2026 — 10:15 AM - 12:00 PM</text:p>
            <text:p/>
            <text:p>WHERE: Cortez Public Library</text:p>
            <text:p/>
            <text:p>Featured Speakers: CO Representative Katie Stewart, CO Senator Cleave Simpson</text:p>
          </table:table-cell>
          <table:table-cell office:value-type="string" calcext:value-type="string">
            <text:p>Legislative-Update.png</text:p>
          </table:table-cell>
          <table:table-cell table:style-name="ce14"/>
          <table:table-cell table:number-columns-repeated="3"/>
          <table:table-cell table:style-name="ce35" table:number-columns-repeated="16373"/>
        </table:table-row>
        <table:table-row table:style-name="ro11">
          <table:table-cell table:style-name="ce30" office:value-type="date" office:date-value="2026-05-26" calcext:value-type="date">
            <text:p>05/26/26</text:p>
          </table:table-cell>
          <table:table-cell table:style-name="ce30" office:value-type="date" office:date-value="2026-05-28" calcext:value-type="date">
            <text:p>05/28/26</text:p>
          </table:table-cell>
          <table:table-cell table:style-name="ce30" office:value-type="date" office:date-value="2026-06-09" calcext:value-type="date">
            <text:p>06/09/26</text:p>
          </table:table-cell>
          <table:table-cell table:style-name="ce30" table:content-validation-name="val2" office:value-type="string" calcext:value-type="string">
            <text:p>Recurring</text:p>
          </table:table-cell>
          <table:table-cell table:style-name="ce10" office:value-type="string" calcext:value-type="string">
            <text:p>Live Shows at DRB</text:p>
          </table:table-cell>
          <table:table-cell office:value-type="string" calcext:value-type="string">
            <text:p>A summer of amazing artists - June edition</text:p>
            <text:p>Hello DRB fans and music lovers. First and foremost, a profound thank you to all who continue to support the artists and the vision of the DRB to bring the best up and coming musical talent from wherever it is born. We could not do this without you!</text:p>
            <text:p> </text:p>
            <text:p>I’m sending out this newsletter to let you all know about upcoming acts at the brewery, so you won’t miss something precious!  Also, if you don’t want to hear from me, just say so in a response to this letter, and I’ll make sure your email is eradicated from the list.  By the same token, if you know someone who would like to be kept in the loop, forward an email to me.</text:p>
            <text:p>The Spotlight - local and regional solo and duo acts</text:p>
            <text:p>Every Tuesday,  6:30 pm</text:p>
            <text:p/>
            <text:p>[Learn More](<text:a xlink:href="https://www.doloresriverbrewery.com/?utm_campaign=d388846e-d6e2-4b05-9a37-013d4882750e&amp;utm_source=so&amp;utm_medium=mail" xlink:type="simple">https://www.doloresriverbrewery.com/?utm_campaign=d388846e-d6e2-4b05-9a37-013d4882750e&amp;utm_source=so&amp;utm_medium=mail</text:a>)</text:p>
          </table:table-cell>
          <table:table-cell table:number-columns-repeated="5"/>
          <table:table-cell table:style-name="ce35" table:number-columns-repeated="16373"/>
        </table:table-row>
        <table:table-row table:style-name="ro3">
          <table:table-cell table:style-name="ce30" office:value-type="date" office:date-value="2026-05-19" calcext:value-type="date">
            <text:p>05/19/26</text:p>
          </table:table-cell>
          <table:table-cell table:style-name="ce30" table:formula="of:=([.C30]-7)" office:value-type="date" office:date-value="2026-05-31" calcext:value-type="date">
            <text:p>05/31/26</text:p>
          </table:table-cell>
          <table:table-cell table:style-name="ce30" office:value-type="date" office:date-value="2026-06-07" calcext:value-type="date">
            <text:p>06/07/26</text:p>
          </table:table-cell>
          <table:table-cell table:content-validation-name="val2" office:value-type="string" calcext:value-type="string">
            <text:p>Recurring</text:p>
          </table:table-cell>
          <table:table-cell table:style-name="ce34" office:value-type="string" calcext:value-type="string">
            <text:p>Yoga with Meditation &amp; Gong Sound Bath </text:p>
          </table:table-cell>
          <table:table-cell office:value-type="string" calcext:value-type="string">
            <text:p>Join us at the Mancos Public Library (211 W 1st Street) or online via Zoom! Sessions are held on the first Sunday of every month with options at both 7:00 AM and 9:00 AM.</text:p>
          </table:table-cell>
          <table:table-cell office:value-type="string" calcext:value-type="string">
            <text:p>Colette.jpg</text:p>
          </table:table-cell>
          <table:table-cell table:style-name="ce14"/>
          <table:table-cell table:number-columns-repeated="3"/>
          <table:table-cell table:style-name="ce35" table:number-columns-repeated="16373"/>
        </table:table-row>
        <table:table-row table:style-name="ro11">
          <table:table-cell table:style-name="ce30" office:value-type="date" office:date-value="2026-05-29" calcext:value-type="date">
            <text:p>05/29/26</text:p>
          </table:table-cell>
          <table:table-cell table:style-name="ce30" office:value-type="date" office:date-value="2026-06-01" calcext:value-type="date">
            <text:p>06/01/26</text:p>
          </table:table-cell>
          <table:table-cell table:style-name="ce30" office:value-type="date" office:date-value="2026-06-09" calcext:value-type="date">
            <text:p>06/09/26</text:p>
          </table:table-cell>
          <table:table-cell table:style-name="ce22" table:content-validation-name="val2" office:value-type="string" calcext:value-type="string">
            <text:p>Single</text:p>
          </table:table-cell>
          <table:table-cell table:style-name="ce34" office:value-type="string" calcext:value-type="string">
            <text:p>“Thinking Like Water” Film Screening: Episode 2</text:p>
          </table:table-cell>
          <table:table-cell office:value-type="string" calcext:value-type="string">
            <text:p>Back by popular demand after our last sold-out event, join us at the Sunflower Theater on June 9th at 6:00 PM for an in-person screening of the second episode of the “Thinking Like Water” docuseries, “All About a Bird: 1000 Acts of Restoration,” followed by a panel featuring local restoration experts.</text:p>
            <text:p/>
            <text:p>This episode highlights the endangered Gunnison Sage Grouse and how Bill Zeedyk, along with a host of partners and landowners, pull together to save this unique bird. This film is for everyone interested in restoring land and water through low-tech, hands-on methods and private land restoration to support bird habitat. The docuseries follows restoration pioneer Zeedyk and his collaborators as they transform degraded watersheds into more resilient ecosystems—fighting against the ravages of drought and climate change.</text:p>
            <text:p/>
            <text:p>Scan the code or register at quiviracoalition.org/events/thinking-like-water-2.</text:p>
            <text:p/>
            <text:p>Event hosted by: Quivira Coalition, Mountain Studies Institute, Mancos Conservation District, Montezuma Land Conservancy, and High Desert Conservation District. Photo credit: Bob Gress.</text:p>
          </table:table-cell>
          <table:table-cell office:value-type="string" calcext:value-type="string">
            <text:p>TLW-Flyer.jpg</text:p>
          </table:table-cell>
          <table:table-cell table:number-columns-repeated="4"/>
          <table:table-cell table:style-name="ce35" table:number-columns-repeated="16373"/>
        </table:table-row>
        <table:table-row table:style-name="ro3">
          <table:table-cell table:style-name="ce30" office:value-type="date" office:date-value="2026-05-18" calcext:value-type="date">
            <text:p>05/18/26</text:p>
          </table:table-cell>
          <table:table-cell table:style-name="ce30" office:value-type="date" office:date-value="2026-06-02" calcext:value-type="date">
            <text:p>06/02/26</text:p>
          </table:table-cell>
          <table:table-cell table:style-name="ce30" office:value-type="date" office:date-value="2026-06-09" calcext:value-type="date">
            <text:p>06/09/26</text:p>
          </table:table-cell>
          <table:table-cell table:style-name="ce18" table:content-validation-name="val2" office:value-type="string" calcext:value-type="string">
            <text:p>Multiple</text:p>
          </table:table-cell>
          <table:table-cell table:style-name="ce34" office:value-type="string" calcext:value-type="string">
            <text:p>City of Cortez: Council Meeting</text:p>
          </table:table-cell>
          <table:table-cell office:value-type="string" calcext:value-type="string">
            <text:p>The next City Council meeting is scheduled for Tuesday, June 9th. Stay informed by signing up to receive City Council agenda notifications via email or text at <text:a xlink:href="https://www.cortezco.gov/list.aspx" xlink:type="simple">https://www.cortezco.gov/list.aspx</text:a>.</text:p>
          </table:table-cell>
          <table:table-cell table:number-columns-repeated="5"/>
          <table:table-cell table:style-name="ce35" table:number-columns-repeated="16373"/>
        </table:table-row>
        <table:table-row table:style-name="ro22">
          <table:table-cell table:style-name="ce30" office:value-type="date" office:date-value="2026-05-12" calcext:value-type="date">
            <text:p>05/12/26</text:p>
          </table:table-cell>
          <table:table-cell table:style-name="ce30" table:formula="of:=([.C33]-7)" office:value-type="date" office:date-value="2026-06-02" calcext:value-type="date">
            <text:p>06/02/26</text:p>
          </table:table-cell>
          <table:table-cell table:style-name="ce30" office:value-type="date" office:date-value="2026-06-09" calcext:value-type="date">
            <text:p>06/09/26</text:p>
          </table:table-cell>
          <table:table-cell table:style-name="ce17" table:content-validation-name="val2" office:value-type="string" calcext:value-type="string">
            <text:p>Multiple</text:p>
          </table:table-cell>
          <table:table-cell table:style-name="ce34" office:value-type="string" calcext:value-type="string">
            <text:p>Talon Trail Series </text:p>
          </table:table-cell>
          <table:table-cell office:value-type="string" calcext:value-type="string">
            <text:p>Travel across Montezuma County on foot this summer with the Talon Trail Series running June-September! Run 10k, 5k or walk 2mi. Snacks, hydration, finger foods, product demos and prizes await you at each event! Challenge yourself to attend all 4 events, participants in all events will get an exclusive T-shirt and be entered into a drawing for $100 in Cortez Cash and a new pair of running shoes from Run + Hike! This event is brought to you by the LOR Foundation, Squirrel Congress, Osprey, Run + Hike, the Galloping Goat Run Club, Dolores Bike Hostel, Cortez Retail Enhancement Association, Tailwind Nutrition, GU Energy Labs and Darn Tough.</text:p>
            <text:p/>
            <text:p>Event Details:</text:p>
            <text:p>June 9, Dolores Bike Hostel, 5:30pm</text:p>
            <text:p>July 9, Chicken Creek Trailhead, 5:30pm</text:p>
            <text:p>August 11, Boggy Draw Trailhead, 5:30pm</text:p>
            <text:p>September 10, Run + Hike, 5:30pm</text:p>
            <text:p>More info at <text:a xlink:href="http://squirrelcongress.com/run" xlink:type="simple">squirrelcongress.com/run</text:a> </text:p>
          </table:table-cell>
          <table:table-cell office:value-type="string" calcext:value-type="string">
            <text:p>Community Run 2026.jpg</text:p>
          </table:table-cell>
          <table:table-cell table:number-columns-repeated="4"/>
          <table:table-cell table:style-name="ce35" table:number-columns-repeated="16373"/>
        </table:table-row>
        <table:table-row table:style-name="ro14">
          <table:table-cell table:style-name="ce30" office:value-type="date" office:date-value="2026-05-27" calcext:value-type="date">
            <text:p>05/27/26</text:p>
          </table:table-cell>
          <table:table-cell table:style-name="ce30" office:value-type="date" office:date-value="2026-06-04" calcext:value-type="date">
            <text:p>06/04/26</text:p>
          </table:table-cell>
          <table:table-cell table:style-name="ce30" office:value-type="date" office:date-value="2026-06-11" calcext:value-type="date">
            <text:p>06/11/26</text:p>
          </table:table-cell>
          <table:table-cell table:style-name="ce17" table:content-validation-name="val2" office:value-type="string" calcext:value-type="string">
            <text:p>Single</text:p>
          </table:table-cell>
          <table:table-cell table:style-name="ce10" office:value-type="string" calcext:value-type="string">
            <text:p>Movie Club: Joy</text:p>
          </table:table-cell>
          <table:table-cell office:value-type="string" calcext:value-type="string">
            <text:p>Thursday, June 11th, 5:15 PM</text:p>
            <text:p>"Joy" follows a determined woman who overcomes personal and professional obstacles to establish a successful business empire.</text:p>
            <text:p>Beverages and movie theatre popcorn are included. Run time: 2 hours 4 minutes. </text:p>
          </table:table-cell>
          <table:table-cell office:value-type="string" calcext:value-type="string">
            <text:p>Movie-Night-JOY.jpg</text:p>
          </table:table-cell>
          <table:table-cell table:number-columns-repeated="4"/>
          <table:table-cell table:style-name="ce35" table:number-columns-repeated="16373"/>
        </table:table-row>
        <table:table-row table:style-name="ro22">
          <table:table-cell table:style-name="ce17" office:value-type="date" office:date-value="2026-05-29" calcext:value-type="date">
            <text:p>05/29/26</text:p>
          </table:table-cell>
          <table:table-cell table:style-name="ce30" office:value-type="date" office:date-value="2026-06-05" calcext:value-type="date">
            <text:p>06/05/26</text:p>
          </table:table-cell>
          <table:table-cell table:style-name="ce30" office:value-type="date" office:date-value="2026-06-13" calcext:value-type="date">
            <text:p>06/13/26</text:p>
          </table:table-cell>
          <table:table-cell table:style-name="ce17" table:content-validation-name="val2" office:value-type="string" calcext:value-type="string">
            <text:p>Single</text:p>
          </table:table-cell>
          <table:table-cell table:style-name="ce12" office:value-type="string" calcext:value-type="string">
            <text:p>Four Corners Poetry Festival </text:p>
          </table:table-cell>
          <table:table-cell office:value-type="string" calcext:value-type="string">
            <text:p>Join us for the inaugural Four Corners Poetry Festival, hosted by Durango Poet Laureate Esther Belin on Saturday, June 13th from 10am - 7pm at the Durango Public Library! This free, one-day festival will include workshops and readings from poets laureate from the Four Corners including Tommy Archuleta (Poet Laureate from Santa Fe), Jake Skeets (Poet Laureate from the Navajo Nation), Laura Tohe (Poet Laureate from Arizona), and Crisosto Apache (our newest appointed Poet Laureate from Colorado).</text:p>
            <text:p/>
            <text:p>During the festival, we will also have a panel, community reading, book signings, and other poetry-loving activities. Past Western Slope Poet Laureate Art Goodtimes will also lead his widely celebrated "Talking Gourds Sharing Circle."</text:p>
            <text:p/>
            <text:p>To see the full schedule and register for workshops, check out the [webpage](<text:a xlink:href="https://www.durangoco.gov/1881/Four-Corners-Poetry-Festival" xlink:type="simple">https://www.durangoco.gov/1881/Four-Corners-Poetry-Festival</text:a>) </text:p>
            <text:p>All free and open to the public! Questions? [Email](<text:a xlink:href="mailto:evietoland@gmail.com" xlink:type="simple">evietoland@gmail.com</text:a></text:p>
            <text:p/>
          </table:table-cell>
          <table:table-cell office:value-type="string" calcext:value-type="string">
            <text:p>Four-Corners-Poetry-Festival-Flyer.jpg</text:p>
          </table:table-cell>
          <table:table-cell table:number-columns-repeated="4"/>
          <table:table-cell table:style-name="ce35" table:number-columns-repeated="16373"/>
        </table:table-row>
        <table:table-row table:style-name="ro3">
          <table:table-cell table:style-name="ce30" office:value-type="date" office:date-value="2026-05-18" calcext:value-type="date">
            <text:p>05/18/26</text:p>
          </table:table-cell>
          <table:table-cell table:style-name="ce30" office:value-type="date" office:date-value="2026-06-06" calcext:value-type="date">
            <text:p>06/06/26</text:p>
          </table:table-cell>
          <table:table-cell table:style-name="ce30" office:value-type="date" office:date-value="2026-06-12" calcext:value-type="date">
            <text:p>06/12/26</text:p>
          </table:table-cell>
          <table:table-cell table:style-name="ce18" table:content-validation-name="val2" office:value-type="string" calcext:value-type="string">
            <text:p>Single</text:p>
          </table:table-cell>
          <table:table-cell table:style-name="ce34" office:value-type="string" calcext:value-type="string">
            <text:p>Alive at 25 Defensive Driving Course</text:p>
          </table:table-cell>
          <table:table-cell office:value-type="string" calcext:value-type="string">
            <text:p>The Cortez Police Department is hosting the Alive at 25 Defensive Driving Course on Saturday, June 13th. Secure your spot and find course details at <text:a xlink:href="https://aliveat25.us/co/course-info?course_id=15067" xlink:type="simple">https://aliveat25.us/co/course-info?course_id=15067</text:a>.</text:p>
          </table:table-cell>
          <table:table-cell office:value-type="string" calcext:value-type="string">
            <text:p>Alive-at-25.png</text:p>
          </table:table-cell>
          <table:table-cell table:number-columns-repeated="4"/>
          <table:table-cell table:style-name="ce35" table:number-columns-repeated="16373"/>
        </table:table-row>
        <table:table-row table:style-name="ro10">
          <table:table-cell table:style-name="ce30" office:value-type="date" office:date-value="2026-05-28" calcext:value-type="date">
            <text:p>05/28/26</text:p>
          </table:table-cell>
          <table:table-cell table:style-name="ce30" office:value-type="date" office:date-value="2026-06-06" calcext:value-type="date">
            <text:p>06/06/26</text:p>
          </table:table-cell>
          <table:table-cell table:style-name="ce30" office:value-type="date" office:date-value="2026-06-13" calcext:value-type="date">
            <text:p>06/13/26</text:p>
          </table:table-cell>
          <table:table-cell table:style-name="ce17" table:content-validation-name="val2" office:value-type="string" calcext:value-type="string">
            <text:p>Single</text:p>
          </table:table-cell>
          <table:table-cell table:style-name="ce12" office:value-type="string" calcext:value-type="string">
            <text:p>Summer Reading Jurassic Park Showing</text:p>
          </table:table-cell>
          <table:table-cell table:style-name="ce9" office:value-type="string" calcext:value-type="string">
            <text:p>Summer Reading-Jurassic Park 1993 Saturday, June 13th, 1 PM </text:p>
            <text:p/>
            <text:p>We will unearth a classic movie about dinosaurs! The original that started it all! This film is rated PG-13. Beverages &amp; Movie Theatre popcorn included.</text:p>
            <text:p/>
            <text:p>Run time 2 hours 7 mins</text:p>
          </table:table-cell>
          <table:table-cell table:number-columns-repeated="5"/>
          <table:table-cell table:style-name="ce35" table:number-columns-repeated="16373"/>
        </table:table-row>
        <table:table-row table:style-name="ro10">
          <table:table-cell table:style-name="ce30" office:value-type="date" office:date-value="2026-05-18" calcext:value-type="date">
            <text:p>05/18/26</text:p>
          </table:table-cell>
          <table:table-cell table:style-name="ce30" office:value-type="date" office:date-value="2026-06-08" calcext:value-type="date">
            <text:p>06/08/26</text:p>
          </table:table-cell>
          <table:table-cell table:style-name="ce30" office:value-type="date" office:date-value="2026-06-14" calcext:value-type="date">
            <text:p>06/14/26</text:p>
          </table:table-cell>
          <table:table-cell table:style-name="ce17" table:content-validation-name="val2" office:value-type="string" calcext:value-type="string">
            <text:p>Multiple</text:p>
          </table:table-cell>
          <table:table-cell table:style-name="ce34" office:value-type="string" calcext:value-type="string">
            <text:p>City of Cortez Presents: Outgrow Your Garage</text:p>
          </table:table-cell>
          <table:table-cell office:value-type="string" calcext:value-type="string">
            <text:p>A Business Workshop</text:p>
            <text:p/>
            <text:p>Ready to streamline your operations? Join the interactive workshop "Make More, Do Less: Profitability Through Process" on Monday, June 15th from 10:00 AM to 11:00 AM. Available both in-person and virtually, this workshop covers process mapping, software implementation, and strategic growth. [Register Now](<text:a xlink:href="https://www.cortezco.gov/FormCenter/Planning-Building-5/Business-Workshop-Registration-113" xlink:type="simple">https://www.cortezco.gov/FormCenter/Planning-Building-5/Business-Workshop-Registration-113</text:a>)</text:p>
          </table:table-cell>
          <table:table-cell table:number-columns-repeated="5"/>
          <table:table-cell table:style-name="ce35" table:number-columns-repeated="16373"/>
        </table:table-row>
        <table:table-row table:style-name="ro1">
          <table:table-cell table:style-name="ce30" office:value-type="date" office:date-value="2026-05-18" calcext:value-type="date">
            <text:p>05/18/26</text:p>
          </table:table-cell>
          <table:table-cell table:style-name="ce30" office:value-type="date" office:date-value="2026-06-11" calcext:value-type="date">
            <text:p>06/11/26</text:p>
          </table:table-cell>
          <table:table-cell table:style-name="ce30" office:value-type="date" office:date-value="2026-06-18" calcext:value-type="date">
            <text:p>06/18/26</text:p>
          </table:table-cell>
          <table:table-cell table:style-name="ce18" table:content-validation-name="val2" office:value-type="string" calcext:value-type="string">
            <text:p>Recurring</text:p>
          </table:table-cell>
          <table:table-cell table:style-name="ce34" office:value-type="string" calcext:value-type="string">
            <text:p>Third Thursday in Montezuma Park</text:p>
          </table:table-cell>
          <table:table-cell office:value-type="string" calcext:value-type="string">
            <text:p>See flyer for more details</text:p>
          </table:table-cell>
          <table:table-cell office:value-type="string" calcext:value-type="string">
            <text:p>2026-Third-Thursdays.jpg</text:p>
          </table:table-cell>
          <table:table-cell table:number-columns-repeated="4"/>
          <table:table-cell table:style-name="ce35" table:number-columns-repeated="16373"/>
        </table:table-row>
        <table:table-row table:style-name="ro10">
          <table:table-cell table:style-name="ce30" office:value-type="date" office:date-value="2026-05-06" calcext:value-type="date">
            <text:p>05/06/26</text:p>
          </table:table-cell>
          <table:table-cell table:style-name="ce30" office:value-type="date" office:date-value="2026-06-12" calcext:value-type="date">
            <text:p>06/12/26</text:p>
          </table:table-cell>
          <table:table-cell table:style-name="ce30" office:value-type="date" office:date-value="2026-06-19" calcext:value-type="date">
            <text:p>06/19/26</text:p>
          </table:table-cell>
          <table:table-cell table:style-name="ce17" table:content-validation-name="val2" office:value-type="string" calcext:value-type="string">
            <text:p>Multiple</text:p>
          </table:table-cell>
          <table:table-cell table:style-name="ce34" office:value-type="string" calcext:value-type="string">
            <text:p>Dolores River Brewing: Sweet Lizzy Project</text:p>
          </table:table-cell>
          <table:table-cell office:value-type="string" calcext:value-type="string">
            <text:p>Experience the electrifying pop-rock and classic rock heart of Sweet Lizzy Project on Friday, June 19th at 8:00 PM. After becoming the "it band" in Havana and earning major music nominations in Cuba, they relocated to Nashville. Led by a lightning bolt of a frontwoman and a powerhouse band, their sound features bold, vulnerable lyrics and incredible stage presence.</text:p>
            <text:p/>
            <text:p>[Learn more](<text:a xlink:href="https://www.doloresriverbrewery.com/" xlink:type="simple">https://www.doloresriverbrewery.com</text:a>)</text:p>
          </table:table-cell>
          <table:table-cell table:number-columns-repeated="5"/>
          <table:table-cell table:style-name="ce35" table:number-columns-repeated="16373"/>
        </table:table-row>
        <table:table-row table:style-name="ro20">
          <table:table-cell table:style-name="ce30" office:value-type="date" office:date-value="2026-05-06" calcext:value-type="date">
            <text:p>05/06/26</text:p>
          </table:table-cell>
          <table:table-cell table:style-name="ce30" office:value-type="date" office:date-value="2026-06-13" calcext:value-type="date">
            <text:p>06/13/26</text:p>
          </table:table-cell>
          <table:table-cell table:style-name="ce30" office:value-type="date" office:date-value="2026-06-20" calcext:value-type="date">
            <text:p>06/20/26</text:p>
          </table:table-cell>
          <table:table-cell table:style-name="ce17" table:content-validation-name="val2" office:value-type="string" calcext:value-type="string">
            <text:p>Multiple</text:p>
          </table:table-cell>
          <table:table-cell table:style-name="ce34" office:value-type="string" calcext:value-type="string">
            <text:p><text:span text:style-name="T3">Dolores River Brewing: </text:span>J Roddy Walston</text:p>
          </table:table-cell>
          <table:table-cell office:value-type="string" calcext:value-type="string">
            <text:p>J Roddy Walston takes the stage on Saturday, June 20th at 7:30 PM. Expect a high-intensity, transformative live show that blends the fury of Kurt Cobain, the sweetness of Nilsson, and the power of Zeppelin. This is a performance built on raw movement, feeling, and beautiful chaos.</text:p>
            <text:p/>
            <text:p>[Find details](<text:a xlink:href="https://www.doloresriverbrewery/" xlink:type="simple">https://www.doloresriverbrewery</text:a>.com)</text:p>
          </table:table-cell>
          <table:table-cell table:number-columns-repeated="5"/>
          <table:table-cell table:style-name="ce35" table:number-columns-repeated="16373"/>
        </table:table-row>
        <table:table-row table:style-name="ro3">
          <table:table-cell table:style-name="ce30" office:value-type="date" office:date-value="2026-05-18" calcext:value-type="date">
            <text:p>05/18/26</text:p>
          </table:table-cell>
          <table:table-cell table:style-name="ce30" office:value-type="date" office:date-value="2026-06-16" calcext:value-type="date">
            <text:p>06/16/26</text:p>
          </table:table-cell>
          <table:table-cell table:style-name="ce30" office:value-type="date" office:date-value="2026-06-23" calcext:value-type="date">
            <text:p>06/23/26</text:p>
          </table:table-cell>
          <table:table-cell table:style-name="ce18" table:content-validation-name="val2" office:value-type="string" calcext:value-type="string">
            <text:p>Multiple</text:p>
          </table:table-cell>
          <table:table-cell table:style-name="ce34" office:value-type="string" calcext:value-type="string">
            <text:p>City of Cortez: Council Meeting</text:p>
          </table:table-cell>
          <table:table-cell office:value-type="string" calcext:value-type="string">
            <text:p><text:span text:style-name="T4">A City Council meeting will be held on Tuesday, June 23rd at 7:30 PM. Attend in person at 123 Roger Smith Avenue or watch the [live stream](</text:span><text:a xlink:href="https://www.cortezco.gov/497/City-Council-Live-Stream" xlink:type="simple">https://www.cortezco.gov/497/City-Council-Live-Stream</text:a>)</text:p>
          </table:table-cell>
          <table:table-cell table:number-columns-repeated="5"/>
          <table:table-cell table:style-name="ce35" table:number-columns-repeated="16373"/>
        </table:table-row>
        <table:table-row table:style-name="ro3">
          <table:table-cell table:style-name="ce30" office:value-type="date" office:date-value="2026-05-18" calcext:value-type="date">
            <text:p>05/18/26</text:p>
          </table:table-cell>
          <table:table-cell table:style-name="ce30" office:value-type="date" office:date-value="2026-06-20" calcext:value-type="date">
            <text:p>06/20/26</text:p>
          </table:table-cell>
          <table:table-cell table:style-name="ce30" office:value-type="date" office:date-value="2026-06-26" calcext:value-type="date">
            <text:p>06/26/26</text:p>
          </table:table-cell>
          <table:table-cell table:style-name="ce18" table:content-validation-name="val2" office:value-type="string" calcext:value-type="string">
            <text:p>Multiple</text:p>
          </table:table-cell>
          <table:table-cell table:style-name="ce34" office:value-type="string" calcext:value-type="string">
            <text:p>City of Cortez: Cortez Celtic Fair</text:p>
          </table:table-cell>
          <table:table-cell office:value-type="string" calcext:value-type="string">
            <text:p>Mark your calendars for the annual Cortez Celtic Fair on Saturday, June 27th! For schedule updates, vendor info, and entertainment lineups, follow the [official page](<text:a xlink:href="https://www.facebook.com/celticcortez" xlink:type="simple">https://www.facebook.com/celticcortez</text:a>)</text:p>
          </table:table-cell>
          <table:table-cell table:number-columns-repeated="5"/>
          <table:table-cell table:style-name="ce35" table:number-columns-repeated="16373"/>
        </table:table-row>
        <table:table-row table:style-name="ro4">
          <table:table-cell table:style-name="ce30" office:value-type="date" office:date-value="2026-04-22" calcext:value-type="date">
            <text:p>04/22/26</text:p>
          </table:table-cell>
          <table:table-cell table:style-name="ce30" office:value-type="date" office:date-value="2026-06-23" calcext:value-type="date">
            <text:p>06/23/26</text:p>
          </table:table-cell>
          <table:table-cell table:style-name="ce30" office:value-type="date" office:date-value="2026-07-07" calcext:value-type="date">
            <text:p>07/07/26</text:p>
          </table:table-cell>
          <table:table-cell table:style-name="ce18" table:content-validation-name="val2" office:value-type="string" calcext:value-type="string">
            <text:p>Single</text:p>
          </table:table-cell>
          <table:table-cell table:style-name="ce34" office:value-type="string" calcext:value-type="string">
            <text:p>Summer Farming Courses at the Old Fort </text:p>
          </table:table-cell>
          <table:table-cell office:value-type="string" calcext:value-type="string">
            <text:p>The Old Fort is offering five farming courses this summer season! Join us for a 6-week course to grow knowledge about farming, plants, animals, and tools. All classes will be held in person at the Old Fort. Scholarships are available and if you are a farmer with employees who would like to attend courses, we are offering stipends to support you and your employees. Register here! </text:p>
            <text:p>July 7 - August 13 Plant Basics for Farmers (Wednesdays, 8-10am): Covers everything from plant propagation to seed saving and introduces the basics of botany and seed saving from multiple perspectives.    Growing Specialty Crops at High Elevation (Wednesdays, 10:30am-12pm): Instruction on the basics of crop culture in small-scale diversified vegetable production. It will focus on seed and site sections for harvesting, post-harvest handling, and marketing.</text:p>
          </table:table-cell>
          <table:table-cell office:value-type="string" calcext:value-type="string">
            <text:p>Summer-Farming-Courses-2026_Flyer.jpg</text:p>
          </table:table-cell>
          <table:table-cell table:number-columns-repeated="4"/>
          <table:table-cell table:style-name="ce35" table:number-columns-repeated="16373"/>
        </table:table-row>
        <table:table-row table:style-name="ro18">
          <table:table-cell table:style-name="ce30" office:value-type="date" office:date-value="2026-05-18" calcext:value-type="date">
            <text:p>05/18/26</text:p>
          </table:table-cell>
          <table:table-cell table:style-name="ce30" office:value-type="date" office:date-value="2026-06-27" calcext:value-type="date">
            <text:p>06/27/26</text:p>
          </table:table-cell>
          <table:table-cell table:style-name="ce30" office:value-type="date" office:date-value="2026-07-03" calcext:value-type="date">
            <text:p>07/03/26</text:p>
          </table:table-cell>
          <table:table-cell table:style-name="ce18" table:content-validation-name="val2" office:value-type="string" calcext:value-type="string">
            <text:p>Single</text:p>
          </table:table-cell>
          <table:table-cell table:style-name="ce34" office:value-type="string" calcext:value-type="string">
            <text:p>4th of July Celebration in Parque De Vida</text:p>
          </table:table-cell>
          <table:table-cell office:value-type="string" calcext:value-type="string">
            <text:p>Celebrate Independence Day in Parque De Vida! Enjoy a classic car show from 12:00 PM to 4:00 PM, followed by live music from 3:00 PM to 10:00 PM. The day features a beer garden, food trucks, children's activities, and a local vendor village. (Find more details)(<text:a xlink:href="https://www.cortezco.gov/958/Fourth-of-July-Celebration" xlink:type="simple">https://www.cortezco.gov/958/Fourth-of-July-Celebration</text:a>)</text:p>
          </table:table-cell>
          <table:table-cell table:number-columns-repeated="5"/>
          <table:table-cell table:style-name="ce35" table:number-columns-repeated="16373"/>
        </table:table-row>
        <table:table-row table:style-name="ro18">
          <table:table-cell table:style-name="ce30" office:value-type="date" office:date-value="2026-05-02" calcext:value-type="date">
            <text:p>05/02/26</text:p>
          </table:table-cell>
          <table:table-cell table:style-name="ce30" office:value-type="date" office:date-value="2026-10-31" calcext:value-type="date">
            <text:p>10/31/26</text:p>
          </table:table-cell>
          <table:table-cell table:style-name="ce30" office:value-type="date" office:date-value="2026-11-07" calcext:value-type="date">
            <text:p>11/07/26</text:p>
          </table:table-cell>
          <table:table-cell table:style-name="ce17" table:content-validation-name="val2" office:value-type="string" calcext:value-type="string">
            <text:p>Single</text:p>
          </table:table-cell>
          <table:table-cell table:style-name="ce34" office:value-type="string" calcext:value-type="string">
            <text:p>Wildbelly Fermentation Fest</text:p>
          </table:table-cell>
          <table:table-cell office:value-type="string" calcext:value-type="string">
            <text:p>Wildbelly Fermentation Fest is a gathering to celebrate the magic of microbes.  Through education and hands-on learning we aim to make fermentation approachable and inspire others to connect with the cultures that transform simple ingredients into something extraordinary.  Taking place at the Mancos Community Center, November 7-8th. </text:p>
          </table:table-cell>
          <table:table-cell table:number-columns-repeated="5"/>
          <table:table-cell table:style-name="ce35" table:number-columns-repeated="16373"/>
        </table:table-row>
        <table:table-row table:style-name="ro1">
          <table:table-cell table:style-name="ce30" table:number-columns-repeated="3"/>
          <table:table-cell table:style-name="ce17" table:content-validation-name="val2"/>
          <table:table-cell table:style-name="ce12"/>
          <table:table-cell/>
          <table:table-cell table:style-name="ce12"/>
          <table:table-cell table:number-columns-repeated="4"/>
          <table:table-cell table:style-name="ce35" table:number-columns-repeated="16373"/>
        </table:table-row>
        <table:table-row table:style-name="ro1">
          <table:table-cell table:style-name="ce30" table:number-columns-repeated="3"/>
          <table:table-cell table:style-name="ce17" table:content-validation-name="val2"/>
          <table:table-cell table:style-name="ce12"/>
          <table:table-cell table:number-columns-repeated="6"/>
          <table:table-cell table:style-name="ce35" table:number-columns-repeated="16373"/>
        </table:table-row>
        <table:table-row table:style-name="ro1">
          <table:table-cell table:style-name="ce30" table:number-columns-repeated="3"/>
          <table:table-cell table:style-name="ce18" table:content-validation-name="val2"/>
          <table:table-cell table:style-name="ce34"/>
          <table:table-cell table:number-columns-repeated="6"/>
          <table:table-cell table:style-name="ce35" table:number-columns-repeated="16373"/>
        </table:table-row>
        <table:table-row table:style-name="ro1">
          <table:table-cell table:style-name="ce30" table:number-columns-repeated="3"/>
          <table:table-cell table:style-name="ce17" table:content-validation-name="val2"/>
          <table:table-cell table:style-name="ce34"/>
          <table:table-cell table:number-columns-repeated="6"/>
          <table:table-cell table:style-name="ce35" table:number-columns-repeated="16373"/>
        </table:table-row>
        <table:table-row table:style-name="ro1">
          <table:table-cell table:style-name="ce30" table:number-columns-repeated="3"/>
          <table:table-cell table:content-validation-name="val2"/>
          <table:table-cell table:style-name="ce34"/>
          <table:table-cell table:number-columns-repeated="6"/>
          <table:table-cell table:style-name="ce35" table:number-columns-repeated="16373"/>
        </table:table-row>
        <table:table-row table:style-name="ro1">
          <table:table-cell table:style-name="ce30" table:number-columns-repeated="3"/>
          <table:table-cell table:style-name="ce17" table:content-validation-name="val2"/>
          <table:table-cell table:style-name="ce12"/>
          <table:table-cell table:number-columns-repeated="6"/>
          <table:table-cell table:style-name="ce35" table:number-columns-repeated="16373"/>
        </table:table-row>
        <table:table-row table:style-name="ro1" table:number-rows-repeated="16">
          <table:table-cell table:style-name="ce30" table:number-columns-repeated="3"/>
          <table:table-cell table:style-name="ce22" table:content-validation-name="val2"/>
          <table:table-cell table:style-name="ce34"/>
          <table:table-cell table:number-columns-repeated="6"/>
          <table:table-cell table:style-name="ce35" table:number-columns-repeated="16373"/>
        </table:table-row>
        <table:table-row table:style-name="ro1" table:number-rows-repeated="16">
          <table:table-cell table:style-name="ce30" table:number-columns-repeated="2"/>
          <table:table-cell/>
          <table:table-cell table:style-name="ce22" table:content-validation-name="val2"/>
          <table:table-cell table:style-name="ce34"/>
          <table:table-cell table:number-columns-repeated="6"/>
          <table:table-cell table:style-name="ce35" table:number-columns-repeated="16373"/>
        </table:table-row>
        <table:table-row table:style-name="ro1" table:number-rows-repeated="9">
          <table:table-cell table:style-name="ce30" table:number-columns-repeated="2"/>
          <table:table-cell/>
          <table:table-cell table:content-validation-name="val2"/>
          <table:table-cell table:style-name="ce34"/>
          <table:table-cell table:number-columns-repeated="6"/>
          <table:table-cell table:style-name="ce35" table:number-columns-repeated="16373"/>
        </table:table-row>
        <table:table-row table:style-name="ro1" table:number-rows-repeated="10">
          <table:table-cell table:number-columns-repeated="3"/>
          <table:table-cell table:content-validation-name="val2"/>
          <table:table-cell table:style-name="ce34"/>
          <table:table-cell table:number-columns-repeated="6"/>
          <table:table-cell table:style-name="ce35" table:number-columns-repeated="16373"/>
        </table:table-row>
        <table:table-row table:style-name="ro1" table:number-rows-repeated="1048472">
          <table:table-cell table:number-columns-repeated="3"/>
          <table:table-cell table:content-validation-name="val2"/>
          <table:table-cell table:number-columns-repeated="7"/>
          <table:table-cell table:style-name="ce35" table:number-columns-repeated="16373"/>
        </table:table-row>
        <table:table-row table:style-name="ro1">
          <table:table-cell table:number-columns-repeated="3"/>
          <table:table-cell table:content-validation-name="val2"/>
          <table:table-cell table:number-columns-repeated="7"/>
          <table:table-cell table:style-name="ce35" table:number-columns-repeated="16373"/>
        </table:table-row>
      </table:table>
      <table:named-expressions/>
      <table:database-ranges>
        <table:database-range table:name="__Anonymous_Sheet_DB__0" table:target-range-address="Bulletin.A1:Bulletin.G1048576"/>
        <table:database-range table:name="__Anonymous_Sheet_DB__1" table:target-range-address="Events.A1:Events.H1048576"/>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30">00/00/0000</text:date>, <text:time style:data-style-name="N2" text:time-value="09:49:51.835948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5-30T11:42:22.347713500</dc:date>
    <meta:editing-duration>P2DT10H32M27S</meta:editing-duration>
    <meta:editing-cycles>31</meta:editing-cycles>
    <meta:generator>LibreOffice/25.2.7.2$Windows_X86_64 LibreOffice_project/5cbfd1ab6520636bb5f7b99185aa69bd7456825d</meta:generator>
    <meta:document-statistic meta:table-count="2" meta:cell-count="407" meta:object-count="0"/>
  </office:meta>
</office:document-meta>
</file>